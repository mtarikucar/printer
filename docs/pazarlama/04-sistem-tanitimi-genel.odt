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maskot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meta="urn:oasis:names:tc:opendocument:xmlns:meta:1.0" xmlns:dc="http://purl.org/dc/elements/1.1/" office:version="1.3">
  <office:font-face-decls>
    <style:font-face style:name="Liberation Sans" svg:font-family="'Liberation Sans', Arial, sans-serif" style:font-family-generic="swiss" style:font-pitch="variable"/>
  </office:font-face-decls>
  <office:automatic-styles>
    <style:style style:name="a1" style:family="table">
      <style:table-properties style:width="16.8cm" table:align="left" fo:margin-bottom="0.6cm"/>
    </style:style>
    <style:style style:name="a2" style:family="table-column">
      <style:table-column-properties style:column-width="16.8cm"/>
    </style:style>
    <style:style style:name="a3" style:family="table-cell">
      <style:table-cell-properties fo:background-color="#0B0C0F" fo:padding-top="1.1cm" fo:padding-bottom="1.1cm" fo:padding-left="0.9cm" fo:padding-right="0.9cm" fo:border="none"/>
    </style:style>
    <style:style style:name="a4" style:family="table">
      <style:table-properties style:width="16.0cm" table:align="left" fo:margin-top="0.15cm" fo:margin-bottom="0.4cm"/>
    </style:style>
    <style:style style:name="a5" style:family="table-column">
      <style:table-column-properties style:column-width="4.6cm"/>
    </style:style>
    <style:style style:name="a6" style:family="table-column">
      <style:table-column-properties style:column-width="11.4cm"/>
    </style:style>
    <style:style style:name="a7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8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9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10" style:family="table">
      <style:table-properties style:width="16cm" table:align="left" fo:margin-top="0.25cm" fo:margin-bottom="0.4cm"/>
    </style:style>
    <style:style style:name="a11" style:family="table-column">
      <style:table-column-properties style:column-width="16cm"/>
    </style:style>
    <style:style style:name="a12" style:family="table-cell">
      <style:table-cell-properties fo:background-color="#FFFBEB" fo:padding="0.32cm" fo:border="none" fo:border-left="3pt solid #F59E0B"/>
    </style:style>
    <style:style style:name="a13" style:family="paragraph" style:parent-style-name="CoTitle">
      <style:text-properties fo:color="#92400E"/>
    </style:style>
    <style:style style:name="a14" style:family="table">
      <style:table-properties style:width="16.0cm" table:align="left" fo:margin-top="0.15cm" fo:margin-bottom="0.4cm"/>
    </style:style>
    <style:style style:name="a15" style:family="table-column">
      <style:table-column-properties style:column-width="7.8cm"/>
    </style:style>
    <style:style style:name="a16" style:family="table-column">
      <style:table-column-properties style:column-width="8.2cm"/>
    </style:style>
    <style:style style:name="a17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18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19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0" style:family="table">
      <style:table-properties style:width="16.0cm" table:align="left" fo:margin-top="0.15cm" fo:margin-bottom="0.4cm"/>
    </style:style>
    <style:style style:name="a21" style:family="table-column">
      <style:table-column-properties style:column-width="4.4cm"/>
    </style:style>
    <style:style style:name="a22" style:family="table-column">
      <style:table-column-properties style:column-width="7.6cm"/>
    </style:style>
    <style:style style:name="a23" style:family="table-column">
      <style:table-column-properties style:column-width="4.0cm"/>
    </style:style>
    <style:style style:name="a24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5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6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7" style:family="table">
      <style:table-properties style:width="16.0cm" table:align="left" fo:margin-top="0.15cm" fo:margin-bottom="0.4cm"/>
    </style:style>
    <style:style style:name="a28" style:family="table-column">
      <style:table-column-properties style:column-width="3.6cm"/>
    </style:style>
    <style:style style:name="a29" style:family="table-column">
      <style:table-column-properties style:column-width="7.4cm"/>
    </style:style>
    <style:style style:name="a30" style:family="table-column">
      <style:table-column-properties style:column-width="5.0cm"/>
    </style:style>
    <style:style style:name="a31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32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33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34" style:family="table">
      <style:table-properties style:width="16.0cm" table:align="left" fo:margin-top="0.15cm" fo:margin-bottom="0.4cm"/>
    </style:style>
    <style:style style:name="a35" style:family="table-column">
      <style:table-column-properties style:column-width="5.0cm"/>
    </style:style>
    <style:style style:name="a36" style:family="table-column">
      <style:table-column-properties style:column-width="7.8cm"/>
    </style:style>
    <style:style style:name="a37" style:family="table-column">
      <style:table-column-properties style:column-width="3.2cm"/>
    </style:style>
    <style:style style:name="a38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39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40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41" style:family="table">
      <style:table-properties style:width="16cm" table:align="left" fo:margin-top="0.25cm" fo:margin-bottom="0.4cm"/>
    </style:style>
    <style:style style:name="a42" style:family="table-column">
      <style:table-column-properties style:column-width="16cm"/>
    </style:style>
    <style:style style:name="a43" style:family="table-cell">
      <style:table-cell-properties fo:background-color="#FEF2F2" fo:padding="0.32cm" fo:border="none" fo:border-left="3pt solid #DC2626"/>
    </style:style>
    <style:style style:name="a44" style:family="paragraph" style:parent-style-name="CoTitle">
      <style:text-properties fo:color="#B91C1C"/>
    </style:style>
    <style:style style:name="a45" style:family="table">
      <style:table-properties style:width="16.0cm" table:align="left" fo:margin-top="0.15cm" fo:margin-bottom="0.4cm"/>
    </style:style>
    <style:style style:name="a46" style:family="table-column">
      <style:table-column-properties style:column-width="4.6cm"/>
    </style:style>
    <style:style style:name="a47" style:family="table-column">
      <style:table-column-properties style:column-width="11.4cm"/>
    </style:style>
    <style:style style:name="a48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49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50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</office:automatic-styles>
  <office:body>
    <office:text>
      <table:table table:name="Cover" table:style-name="a1">
        <table:table-column table:style-name="a2"/>
        <table:table-row>
          <table:table-cell table:style-name="a3" office:value-type="string">
            <text:p text:style-name="CvLabel">FIGURUNICA · PAZARLAMA KİTİ</text:p>
            <text:p text:style-name="CvNum">04</text:p>
            <text:p text:style-name="CvTitle">Sistem Tanıtımı</text:p>
            <text:p text:style-name="CvSub">Figurunica’nın ne olduğu, iş modeli, dört taraflı pazaryeri mekaniği, uçtan uca operasyon, teknoloji ve yol haritası.</text:p>
            <text:p text:style-name="CvImg"><draw:frame draw:name="maskot" text:anchor-type="as-char" svg:width="3.1cm" svg:height="3.1cm" draw:z-index="0"><draw:image xlink:href="Pictures/maskot.png" xlink:type="simple" xlink:show="embed" xlink:actuate="onLoad"/></draw:frame></text:p>
            <text:p text:style-name="CvAud">Hedef kitle: yatırımcı · iş ortağı · üst düzey paydaş · yeni ekip üyesi</text:p>
          </table:table-cell>
        </table:table-row>
      </table:table>
      <table:table table:name="Ta4" table:style-name="a4">
        <table:table-column table:style-name="a5"/>
        <table:table-column table:style-name="a6"/>
        <table:table-row>
          <table:table-cell table:style-name="a8" office:value-type="string">
            <text:p text:style-name="TdK">Doküman</text:p>
          </table:table-cell>
          <table:table-cell table:style-name="a8" office:value-type="string">
            <text:p text:style-name="Td">04 — Sistem Tanıtımı</text:p>
          </table:table-cell>
        </table:table-row>
        <table:table-row>
          <table:table-cell table:style-name="a9" office:value-type="string">
            <text:p text:style-name="TdK">Sürüm</text:p>
          </table:table-cell>
          <table:table-cell table:style-name="a9" office:value-type="string">
            <text:p text:style-name="Td">v1.0 · 13 Temmuz 2026</text:p>
          </table:table-cell>
        </table:table-row>
        <table:table-row>
          <table:table-cell table:style-name="a8" office:value-type="string">
            <text:p text:style-name="TdK">Kaynak</text:p>
          </table:table-cell>
          <table:table-cell table:style-name="a8" office:value-type="string">
            <text:p text:style-name="Td">Canlı ürün kodundan doğrulanmış bilgiler (9 alan, 311 bulgu)</text:p>
          </table:table-cell>
        </table:table-row>
        <table:table-row>
          <table:table-cell table:style-name="a9" office:value-type="string">
            <text:p text:style-name="TdK">Kullanım</text:p>
          </table:table-cell>
          <table:table-cell table:style-name="a9" office:value-type="string">
            <text:p text:style-name="Td">İç kullanım — pazarlama ve satış ekibi</text:p>
          </table:table-cell>
        </table:table-row>
      </table:table>
      <table:table table:name="Ca10" table:style-name="a10">
        <table:table-column table:style-name="a11"/>
        <table:table-row>
          <table:table-cell table:style-name="a12" office:value-type="string">
            <text:p text:style-name="a13">Bu doküman müşteriye/partnere olduğu gibi verilmez.</text:p>
            <text:p text:style-name="CoBody">İçinde “asla söylemeyin” bölümü ve netleştirilmemiş operasyonel sorular vardır. Dışarıya çıkacak materyali bu dokümandan <text:span text:style-name="B">üretin</text:span>, dokümanı <text:span text:style-name="B">paylaşmayın</text:span>.</text:p>
          </table:table-cell>
        </table:table-row>
      </table:table>
      <text:p text:style-name="H1PB">İçindekiler</text:p>
      <text:p text:style-name="TocItem">1.  Tek cümlede</text:p>
      <text:p text:style-name="TocItem">2.  Problem ve çözüm</text:p>
      <text:p text:style-name="TocItem">3.  İş modeli</text:p>
      <text:p text:style-name="TocItem">4.  Platformun dört tarafı</text:p>
      <text:p text:style-name="TocItem">5.  Uçtan uca operasyon</text:p>
      <text:p text:style-name="TocItem">6.  Savunulabilirlik — sistemin gerçekten yaptıkları</text:p>
      <text:p text:style-name="TocItem">7.  Şu an canlı olan</text:p>
      <text:p text:style-name="TocItem">8.  Yol haritası — henüz canlıda olmayanlar</text:p>
      <text:p text:style-name="TocItem">9.  Açık riskler ve netleştirilmesi gerekenler</text:p>
      <text:p text:style-name="TocItem">10.  İletişim</text:p>
      <text:h text:style-name="H1" text:outline-level="1">Tek cümlede</text:h>
      <text:p text:style-name="Lead"><text:span text:style-name="B">Figurunica</text:span>, fotoğraftan kişiye özel 3D baskı figür üreten bir üretim stüdyosu ve aynı zamanda onaylı üreticilerin hazır ürünlerini sattığı bir 3D baskı pazaryeridir — yapay zekâ destekli tasarım önizlemesi, dağıtık partner üretim ağı, zorunlu kalite kontrol ve uçtan uca sipariş takibiyle birlikte.</text:p>
      <text:h text:style-name="H1" text:outline-level="1">Problem ve çözüm</text:h>
      <table:table table:name="Ta14" table:style-name="a14">
        <table:table-column table:style-name="a15"/>
        <table:table-column table:style-name="a16"/>
        <table:table-header-rows>
          <table:table-row>
            <table:table-cell table:style-name="a17" office:value-type="string">
              <text:p text:style-name="Th">Problem</text:p>
            </table:table-cell>
            <table:table-cell table:style-name="a17" office:value-type="string">
              <text:p text:style-name="Th">Figurunica’nın çözümü</text:p>
            </table:table-cell>
          </table:table-row>
        </table:table-header-rows>
        <table:table-row>
          <table:table-cell table:style-name="a18" office:value-type="string">
            <text:p text:style-name="TdK">Kişiye özel 3D figür pazarında müşteri, ne alacağını görmeden ödeme yapmak zorunda kalıyor.</text:p>
          </table:table-cell>
          <table:table-cell table:style-name="a18" office:value-type="string">
            <text:p text:style-name="Td">Yapay zekâ <text:span text:style-name="B">iki</text:span> stilize tasarım seçeneği üretir, müşteri seçer ve onaylar. <text:span text:style-name="B">Onaylanmadan üretim başlamaz;</text:span> beğenilmezse 4 tura kadar yeni seçenek veya revizyon talebi.</text:p>
          </table:table-cell>
        </table:table-row>
        <table:table-row>
          <table:table-cell table:style-name="a19" office:value-type="string">
            <text:p text:style-name="TdK">3D baskı atölyeleri ekipmana yatırım yapıyor ama sürekli iş akışı bulamıyor; boş kapasiteyle çalışıyor.</text:p>
          </table:table-cell>
          <table:table-cell table:style-name="a19" office:value-type="string">
            <text:p text:style-name="Td">Dağıtık partner ağı: platform müşteriyi, tasarımı ve ödemeyi getirir; atölyeye yalnızca <text:span text:style-name="B">ödemesi alınmış</text:span>, malzemesine uyan ve kapasitesine sığan iş düşer. Komisyon %35, atölyenin payı %65.</text:p>
          </table:table-cell>
        </table:table-row>
        <table:table-row>
          <table:table-cell table:style-name="a18" office:value-type="string">
            <text:p text:style-name="TdK">Kişiye özel üretimde kalite tutarsızlığı en büyük itibar riski.</text:p>
          </table:table-cell>
          <table:table-cell table:style-name="a18" office:value-type="string">
            <text:p text:style-name="Td">Her siparişte <text:span text:style-name="B">zorunlu, fotoğraflı kalite kontrol.</text:span> Platform onaylamadan kargolama açılmaz; el boyamada ikinci bir tur daha vardır. Turlar kayıt altındadır.</text:p>
          </table:table-cell>
        </table:table-row>
        <table:table-row>
          <table:table-cell table:style-name="a19" office:value-type="string">
            <text:p text:style-name="TdK">Müşteri, siparişinin nerede olduğunu bilmiyor; destek yükü artıyor.</text:p>
          </table:table-cell>
          <table:table-cell table:style-name="a19" office:value-type="string">
            <text:p text:style-name="Td">Üyelik gerektirmeyen, durum değiştiği anda <text:span text:style-name="B">canlı güncellenen</text:span> 8 adımlı sipariş takip sayfası.</text:p>
          </table:table-cell>
        </table:table-row>
      </table:table>
      <text:h text:style-name="H1" text:outline-level="1">İş modeli</text:h>
      <text:p text:style-name="Body">Tek ve tutarlı bir komisyon oranı: <text:span text:style-name="B">platform %35, partner %65.</text:span> Aynı oran üreticiler, boyacılar ve pazaryerinde ürün satan üreticiler için geçerlidir; kodda tek bir sabitten okunur. Komisyon yuvarlanır, net pay tam kalan olarak verilir — komisyon + net her zaman brüte eşittir.</text:p>
      <table:table table:name="Ta20" table:style-name="a20">
        <table:table-column table:style-name="a21"/>
        <table:table-column table:style-name="a22"/>
        <table:table-column table:style-name="a23"/>
        <table:table-header-rows>
          <table:table-row>
            <table:table-cell table:style-name="a24" office:value-type="string">
              <text:p text:style-name="Th">Gelir hattı</text:p>
            </table:table-cell>
            <table:table-cell table:style-name="a24" office:value-type="string">
              <text:p text:style-name="Th">Nasıl çalışır</text:p>
            </table:table-cell>
            <table:table-cell table:style-name="a24" office:value-type="string">
              <text:p text:style-name="Th">Marj</text:p>
            </table:table-cell>
          </table:table-row>
        </table:table-header-rows>
        <table:table-row>
          <table:table-cell table:style-name="a25" office:value-type="string">
            <text:p text:style-name="TdK">Kişiye özel üretim (ana hat)</text:p>
          </table:table-cell>
          <table:table-cell table:style-name="a25" office:value-type="string">
            <text:p text:style-name="Td">Fotoğraftan / 2D tasarımdan / müşterinin STL-OBJ dosyasından figür ve obje üretimi. Fiyat ₺549 – ₺1.799 + bitiş paketi (+₺1.000 el boyama, +₺2.000 lüks vitrin) + ek hizmetler.</text:p>
          </table:table-cell>
          <table:table-cell table:style-name="a25" office:value-type="string">
            <text:p text:style-name="Td">Üretim partnere verilirse <text:span text:style-name="B">%35 komisyon</text:span></text:p>
          </table:table-cell>
        </table:table-row>
        <table:table-row>
          <table:table-cell table:style-name="a26" office:value-type="string">
            <text:p text:style-name="TdK">Pazaryeri</text:p>
          </table:table-cell>
          <table:table-cell table:style-name="a26" office:value-type="string">
            <text:p text:style-name="Td">Onaylı üreticiler kendi hazır ürünlerini listeler; her ürün admin onayından geçer, siparişe özel üretilir. Fiyatı satıcı belirler.</text:p>
          </table:table-cell>
          <table:table-cell table:style-name="a26" office:value-type="string">
            <text:p text:style-name="Td"><text:span text:style-name="B">%35 komisyon</text:span></text:p>
          </table:table-cell>
        </table:table-row>
        <table:table-row>
          <table:table-cell table:style-name="a25" office:value-type="string">
            <text:p text:style-name="TdK">Boyama katmanı</text:p>
          </table:table-cell>
          <table:table-cell table:style-name="a25" office:value-type="string">
            <text:p text:style-name="Td">El boyama ₺1.000’lik bir bitiş olarak satılır; iş boyacı partnere devredilir.</text:p>
          </table:table-cell>
          <table:table-cell table:style-name="a25" office:value-type="string">
            <text:p text:style-name="Td"><text:span text:style-name="B">%35 komisyon</text:span> (boyacıya net ₺650)</text:p>
          </table:table-cell>
        </table:table-row>
        <table:table-row>
          <table:table-cell table:style-name="a26" office:value-type="string">
            <text:p text:style-name="TdK">Hediyelik ürünler</text:p>
          </table:table-cell>
          <table:table-cell table:style-name="a26" office:value-type="string">
            <text:p text:style-name="Td">Anahtarlık ₺149, magnet ₺129, gece lambası ₺399 — sabit fiyat, fotoğraftan üretim.</text:p>
          </table:table-cell>
          <table:table-cell table:style-name="a26" office:value-type="string">
            <text:p text:style-name="Td">Sabit fiyatlı satış</text:p>
          </table:table-cell>
        </table:table-row>
        <table:table-row>
          <table:table-cell table:style-name="a25" office:value-type="string">
            <text:p text:style-name="TdK">Atölye etkinlikleri</text:p>
          </table:table-cell>
          <table:table-cell table:style-name="a25" office:value-type="string">
            <text:p text:style-name="Td">Mekânda uygulamalı figür boyama &amp; tasarım atölyesi; talep formu → özel teklif.</text:p>
          </table:table-cell>
          <table:table-cell table:style-name="a25" office:value-type="string">
            <text:p text:style-name="Td">Etkinlik başına özel fiyat</text:p>
          </table:table-cell>
        </table:table-row>
        <table:table-row>
          <table:table-cell table:style-name="a26" office:value-type="string">
            <text:p text:style-name="TdK">Ek hizmetler</text:p>
          </table:table-cell>
          <table:table-cell table:style-name="a26" office:value-type="string">
            <text:p text:style-name="Td">Ekstra boya katmanı ₺49, hediye paketi ₺29, hızlı kargo ₺79, dijital dosyalar ₺99.</text:p>
          </table:table-cell>
          <table:table-cell table:style-name="a26" office:value-type="string">
            <text:p text:style-name="Td">Doğrudan satış</text:p>
          </table:table-cell>
        </table:table-row>
      </table:table>
      <text:p text:style-name="Note">Sabit maliyet avantajı: üretim kapasitesi partner atölyelerde olduğu için ölçeklenme makine yatırımı gerektirmez. Nakit riski düşüktür — üretime yalnızca ödemesi alınmış siparişler düşer.</text:p>
      <text:h text:style-name="H1PB" text:outline-level="1">Platformun dört tarafı</text:h>
      <table:table table:name="Ta27" table:style-name="a27">
        <table:table-column table:style-name="a28"/>
        <table:table-column table:style-name="a29"/>
        <table:table-column table:style-name="a30"/>
        <table:table-header-rows>
          <table:table-row>
            <table:table-cell table:style-name="a31" office:value-type="string">
              <text:p text:style-name="Th">Taraf</text:p>
            </table:table-cell>
            <table:table-cell table:style-name="a31" office:value-type="string">
              <text:p text:style-name="Th">Ne yapar</text:p>
            </table:table-cell>
            <table:table-cell table:style-name="a31" office:value-type="string">
              <text:p text:style-name="Th">Ne kazanır</text:p>
            </table:table-cell>
          </table:table-row>
        </table:table-header-rows>
        <table:table-row>
          <table:table-cell table:style-name="a32" office:value-type="string">
            <text:p text:style-name="TdK"><text:span text:style-name="B">Müşteri</text:span></text:p>
          </table:table-cell>
          <table:table-cell table:style-name="a32" office:value-type="string">
            <text:p text:style-name="Td">Fotoğraf/tasarım/3D dosya yükler veya mağazadan hazır ürün alır; tasarımı onaylar, öder, siparişini canlı takip eder.</text:p>
          </table:table-cell>
          <table:table-cell table:style-name="a32" office:value-type="string">
            <text:p text:style-name="Td">Onaylamadan üretim başlamayan, kalite kontrolden geçmiş kişiye özel ürün</text:p>
          </table:table-cell>
        </table:table-row>
        <table:table-row>
          <table:table-cell table:style-name="a33" office:value-type="string">
            <text:p text:style-name="TdK"><text:span text:style-name="B">Üretici</text:span></text:p>
          </table:table-cell>
          <table:table-cell table:style-name="a33" office:value-type="string">
            <text:p text:style-name="Td">Atanan siparişi kabul eder, basar, fotoğraflı kalite kontrolden geçirir, kargolar. İsterse kendi ürünlerini pazaryerine listeler.</text:p>
          </table:table-cell>
          <table:table-cell table:style-name="a33" office:value-type="string">
            <text:p text:style-name="Td">Sipariş tutarının <text:span text:style-name="B">%65’i</text:span> + pazaryeri satış geliri</text:p>
          </table:table-cell>
        </table:table-row>
        <table:table-row>
          <table:table-cell table:style-name="a32" office:value-type="string">
            <text:p text:style-name="TdK"><text:span text:style-name="B">Boyacı</text:span></text:p>
          </table:table-cell>
          <table:table-cell table:style-name="a32" office:value-type="string">
            <text:p text:style-name="Td">Üreticiden devraldığı boyasız figürü boyar, kalite kontrolden geçirir, doğrudan müşteriye kargolar.</text:p>
          </table:table-cell>
          <table:table-cell table:style-name="a32" office:value-type="string">
            <text:p text:style-name="Td">El boyama bedelinin <text:span text:style-name="B">%65’i</text:span> = figür başına net <text:span text:style-name="B">₺650</text:span></text:p>
          </table:table-cell>
        </table:table-row>
        <table:table-row>
          <table:table-cell table:style-name="a33" office:value-type="string">
            <text:p text:style-name="TdK"><text:span text:style-name="B">Platform</text:span></text:p>
          </table:table-cell>
          <table:table-cell table:style-name="a33" office:value-type="string">
            <text:p text:style-name="Td">Talep yaratır, tasarımı üretir/hazırlar, ödemeyi ve iadeyi yönetir, üreticiyi atar, kalite kontrolü onaylar, lojistiği ve müşteri iletişimini yürütür.</text:p>
          </table:table-cell>
          <table:table-cell table:style-name="a33" office:value-type="string">
            <text:p text:style-name="Td"><text:span text:style-name="B">%35 komisyon</text:span> + sabit fiyatlı ürün ve hizmet satışı</text:p>
          </table:table-cell>
        </table:table-row>
      </table:table>
      <text:h text:style-name="H1" text:outline-level="1">Uçtan uca operasyon</text:h>
      <text:list text:style-name="OL">
        <text:list-item>
          <text:p text:style-name="ListBody"><text:span text:style-name="B">Talep:</text:span> müşteri üç yoldan biriyle girer — fotoğraftan üretim, 2D tasarım/logodan ürün ya da kendi STL/OBJ dosyası. Ayrıca hazır ürün mağazası vardır.</text:p>
        </text:list-item>
        <text:list-item>
          <text:p text:style-name="ListBody"><text:span text:style-name="B">Tasarım önizlemesi:</text:span> yapay zekâ, fotoğraftan <text:span text:style-name="B">iki</text:span> stilize 2D görsel üretir (7 tasarım deseni). Müşteri seçer; beğenmezse 4 tura kadar yeniler veya revizyon talebi bırakır. Arka plan temizleme kendi sunucumuzda yapılır.</text:p>
        </text:list-item>
        <text:list-item>
          <text:p text:style-name="ListBody"><text:span text:style-name="B">Ödeme:</text:span> kart (3D Secure, kart bilgisi platforma hiç girmez) veya havale/EFT (%3 indirim). Havale dekontu otomatik okunur; tutar ±1 TL toleransla eşleşir ve çoğu dekont insan beklemeden onaylanır.</text:p>
        </text:list-item>
        <text:list-item>
          <text:p text:style-name="ListBody"><text:span text:style-name="B">Model hazırlığı:</text:span> ekip, onaylı tasarımdan 3D modeli hazırlayıp sisteme yükler. (Kendi dosyasını yükleyen sipariş bu adımı atlar.)</text:p>
        </text:list-item>
        <text:list-item>
          <text:p text:style-name="ListBody"><text:span text:style-name="B">Üretici ataması:</text:span> sistem uygun atölyeleri <text:span text:style-name="B">lokasyon, iş yükü, geçmiş güvenilirlik ve uyum puanına</text:span> göre sıralar; ilk atamayı yönetici onaylar. Atölye reddederse iş otomatik olarak sıradaki uygun atölyeye geçer (3 retten sonra yönetici kuyruğuna düşer).</text:p>
        </text:list-item>
        <text:list-item>
          <text:p text:style-name="ListBody"><text:span text:style-name="B">Üretim + kalite kontrol:</text:span> atölye basar, en az bir ürün fotoğrafı yükleyip kalite kontrole gönderir. Platform onaylamadan kargolama açılmaz.</text:p>
        </text:list-item>
        <text:list-item>
          <text:p text:style-name="ListBody"><text:span text:style-name="B">El boyama (opsiyonel):</text:span> figür boyacı partnere devredilir, boyanır ve <text:span text:style-name="B">ikinci</text:span> bir kalite kontrolden geçer. Kendi atölyesinde boyayan üretici bu adımı kendisi yapar.</text:p>
        </text:list-item>
        <text:list-item>
          <text:p text:style-name="ListBody"><text:span text:style-name="B">Kargo ve takip:</text:span> Yurtiçi, Aras, MNG, PTT ve Sürat desteklenir; müşteriye tıklanabilir takip bağlantısı, e-posta ve site içi bildirim gider. Takip sayfası üyeliksizdir ve canlı güncellenir.</text:p>
        </text:list-item>
        <text:list-item>
          <text:p text:style-name="ListBody"><text:span text:style-name="B">Satış sonrası:</text:span> kargolanmış siparişte “sorun bildir” akışı; hasar teslimattan sonraki 48 saat içinde fotoğrafla bildirilirse ücretsiz yeniden üretim, değişim veya bedel iadesi.</text:p>
        </text:list-item>
      </text:list>
      <text:h text:style-name="H1PB" text:outline-level="1">Savunulabilirlik — sistemin gerçekten yaptıkları</text:h>
      <text:list text:style-name="UL">
        <text:list-item>
          <text:p text:style-name="ListBody"><text:span text:style-name="B">Onaya dayalı üretim.</text:span> Müşteri tasarımı onaylamadan hiçbir şey basılmaz. Bu, kişiye özel üretimdeki en büyük iade/şikâyet sebebini kaynağında keser.</text:p>
        </text:list-item>
        <text:list-item>
          <text:p text:style-name="ListBody"><text:span text:style-name="B">Zorunlu, fotoğraflı kalite kontrol.</text:span> Kargolama, kalite kontrol onayı olmadan teknik olarak mümkün değildir; el boyamada ikinci tur vardır ve turlar kayıt altındadır.</text:p>
        </text:list-item>
        <text:list-item>
          <text:p text:style-name="ListBody"><text:span text:style-name="B">Akıllı üretici yönlendirme.</text:span> Sipariş; malzemesine uyan, kapasitesi olan ve müşteriye yakın atölyeye gider. Ret durumunda otomatik yeniden yönlendirme çalışır.</text:p>
        </text:list-item>
        <text:list-item>
          <text:p text:style-name="ListBody"><text:span text:style-name="B">Otomatik dekont okuma.</text:span> Havale dekontu okunur; tutar ±1 TL toleransla eşleşir, referans bulanık eşleştirmeyle bile bulunur ve tanınan banka şablonlarında ödeme insan beklemeden onaylanır. IBAN uyuşmazlığında otomatik onay asla verilmez.</text:p>
        </text:list-item>
        <text:list-item>
          <text:p text:style-name="ListBody"><text:span text:style-name="B">Ödeme güvenliği.</text:span> Kart bilgileri platform sunucularına hiç girmez; ödeme bildirimi HMAC-SHA256 imzayla doğrulanır — sahte “ödeme başarılı” bildirimiyle sipariş açtırılamaz. Şifreler bcrypt ile saklanır.</text:p>
        </text:list-item>
        <text:list-item>
          <text:p text:style-name="ListBody"><text:span text:style-name="B">Fikrî mülkiyet koruması.</text:span> Baskı dosyaları alıcılara hiçbir zaman gösterilmez; yalnızca siparişi atanan üretici yetki kontrolünden geçen bir uçtan indirebilir. Müşteri kendi STL/OBJ dosyasını ancak ₺99’luk dijital dosya ek hizmetini aldıysa indirebilir.</text:p>
        </text:list-item>
        <text:list-item>
          <text:p text:style-name="ListBody"><text:span text:style-name="B">Sahte yorum imkânsız.</text:span> Ürün yorumunu yalnızca o ürünü satın alıp teslim almış kayıtlı müşteri, ürün başına bir kez yazabilir.</text:p>
        </text:list-item>
        <text:list-item>
          <text:p text:style-name="ListBody"><text:span text:style-name="B">Partner ekonomisinde tek ve net oran.</text:span> %35 / %65 — üretici, boyacı ve pazaryeri satışında aynı. Hak ediş kargoda (boyamada devirde) tahakkuk eder, iade/uyuşmazlıkta geri alınır. Kuruş kaybı yoktur.</text:p>
        </text:list-item>
        <text:list-item>
          <text:p text:style-name="ListBody"><text:span text:style-name="B">Partner disiplini.</text:span> Kabul edilen siparişin iptali veya müşteri şikâyetinin partner aleyhine sonuçlanması “strike” doğurur; 3 strike’ta üretici hesabı otomatik askıya alınır.</text:p>
        </text:list-item>
        <text:list-item>
          <text:p text:style-name="ListBody"><text:span text:style-name="B">KVKK’ya uygun ölçüm.</text:span> Çerez rızası varsayılan “reddet” mantığıyla çalışır; onay verilmeden analitik ve pazarlama çerezleri çalışmaz. Sunucu tarafında IP adresleri hash’lenir, olay kayıtları 180 gün sonra otomatik silinir. Ticari ileti izni opt-in ve zaman damgalıdır.</text:p>
        </text:list-item>
      </text:list>
      <text:h text:style-name="H1" text:outline-level="1">Şu an canlı olan</text:h>
      <text:list text:style-name="UL">
        <text:list-item>
          <text:p text:style-name="ListBody">Üç girişli üretim akışı (fotoğraf · 2D tasarım · STL/OBJ yükleme) + 7 tasarım deseni.</text:p>
        </text:list-item>
        <text:list-item>
          <text:p text:style-name="ListBody">Yapay zekâ ile iki varyasyonlu tasarım önizlemesi ve müşteri onayı.</text:p>
        </text:list-item>
        <text:list-item>
          <text:p text:style-name="ListBody">Hazır ürün pazaryeri: kategori/arama/filtre, satıcı bazında bölünen tek sepet, satın alma doğrulamalı yorumlar.</text:p>
        </text:list-item>
        <text:list-item>
          <text:p text:style-name="ListBody">Kart ve havale/EFT ödeme + otomatik dekont okuma + hediye kartı.</text:p>
        </text:list-item>
        <text:list-item>
          <text:p text:style-name="ListBody">Üretici paneli (siparişler, ürünler, kazançlar, bildirimler, profil) ve boyacı paneli.</text:p>
        </text:list-item>
        <text:list-item>
          <text:p text:style-name="ListBody">Zorunlu fotoğraflı kalite kontrol + el boyama için ikinci kalite kontrol turu.</text:p>
        </text:list-item>
        <text:list-item>
          <text:p text:style-name="ListBody">Beş kargo firması desteği, üyeliksiz canlı sipariş takibi, e-posta ve site içi bildirimler.</text:p>
        </text:list-item>
        <text:list-item>
          <text:p text:style-name="ListBody">Mekânda atölye talep sistemi (WS- referansı, dört aşamalı yaşam döngüsü, KVKK rızası).</text:p>
        </text:list-item>
        <text:list-item>
          <text:p text:style-name="ListBody">Yönetim paneli: sipariş yönetimi, dekont incelemesi, üretici/boyacı yönetimi, ürün onayı, iade, kanal bazlı ciro raporu.</text:p>
        </text:list-item>
      </text:list>
      <text:h text:style-name="H1" text:outline-level="1">Yol haritası — henüz canlıda olmayanlar</text:h>
      <text:p text:style-name="Body">Aşağıdakiler bilinçli olarak “yok” kabul edilmelidir. Dış iletişimde bunlar vaat edilmemelidir; yatırımcı/paydaş sunumunda ise yol haritası olarak dürüstçe konumlandırılır.</text:p>
      <table:table table:name="Ta34" table:style-name="a34">
        <table:table-column table:style-name="a35"/>
        <table:table-column table:style-name="a36"/>
        <table:table-column table:style-name="a37"/>
        <table:table-header-rows>
          <table:table-row>
            <table:table-cell table:style-name="a38" office:value-type="string">
              <text:p text:style-name="Th">Eksik</text:p>
            </table:table-cell>
            <table:table-cell table:style-name="a38" office:value-type="string">
              <text:p text:style-name="Th">Etkisi</text:p>
            </table:table-cell>
            <table:table-cell table:style-name="a38" office:value-type="string">
              <text:p text:style-name="Th">Önem</text:p>
            </table:table-cell>
          </table:table-row>
        </table:table-header-rows>
        <table:table-row>
          <table:table-cell table:style-name="a39" office:value-type="string">
            <text:p text:style-name="TdK">Kupon / indirim kodu motoru</text:p>
          </table:table-cell>
          <table:table-cell table:style-name="a39" office:value-type="string">
            <text:p text:style-name="Td">Kampanya kurgusu yalnızca %3 havale indirimi ve hediye kartıyla sınırlı. Performans pazarlaması için engel.</text:p>
          </table:table-cell>
          <table:table-cell table:style-name="a39" office:value-type="string">
            <text:p text:style-name="Td"><text:span text:style-name="B">Yüksek</text:span></text:p>
          </table:table-cell>
        </table:table-row>
        <table:table-row>
          <table:table-cell table:style-name="a40" office:value-type="string">
            <text:p text:style-name="TdK">Hediye kartı satın alma sayfası</text:p>
          </table:table-cell>
          <table:table-cell table:style-name="a40" office:value-type="string">
            <text:p text:style-name="Td">Kartlar yalnızca yönetici tarafından oluşturulabiliyor; müşteri satın alamıyor. Yılbaşı/bayram kampanyası bunsuz kurulamaz.</text:p>
          </table:table-cell>
          <table:table-cell table:style-name="a40" office:value-type="string">
            <text:p text:style-name="Td"><text:span text:style-name="B">Yüksek</text:span></text:p>
          </table:table-cell>
        </table:table-row>
        <table:table-row>
          <table:table-cell table:style-name="a39" office:value-type="string">
            <text:p text:style-name="TdK">E-fatura / e-arşiv entegrasyonu</text:p>
          </table:table-cell>
          <table:table-cell table:style-name="a39" office:value-type="string">
            <text:p text:style-name="Td">Kurumsal satışta doğrudan engel; entegrasyon şu an bir taslaktır.</text:p>
          </table:table-cell>
          <table:table-cell table:style-name="a39" office:value-type="string">
            <text:p text:style-name="Td"><text:span text:style-name="B">Yüksek</text:span></text:p>
          </table:table-cell>
        </table:table-row>
        <table:table-row>
          <table:table-cell table:style-name="a40" office:value-type="string">
            <text:p text:style-name="TdK">Boyacı kazanç/ödeme paneli</text:p>
          </table:table-cell>
          <table:table-cell table:style-name="a40" office:value-type="string">
            <text:p text:style-name="Td">Boyacıda sipariş bazlı kazanç dökümü ve ödeme talep düğmesi yok; ödeme manuel yürüyor. Partner kazanımında ilk sorulan soru.</text:p>
          </table:table-cell>
          <table:table-cell table:style-name="a40" office:value-type="string">
            <text:p text:style-name="Td"><text:span text:style-name="B">Yüksek</text:span></text:p>
          </table:table-cell>
        </table:table-row>
        <table:table-row>
          <table:table-cell table:style-name="a39" office:value-type="string">
            <text:p text:style-name="TdK">Otomatik para iadesi</text:p>
          </table:table-cell>
          <table:table-cell table:style-name="a39" office:value-type="string">
            <text:p text:style-name="Td">İade butonu ödeme sağlayıcısına otomatik iade çağrısı yapmıyor; iade manuel bir operasyon.</text:p>
          </table:table-cell>
          <table:table-cell table:style-name="a39" office:value-type="string">
            <text:p text:style-name="Td">Orta</text:p>
          </table:table-cell>
        </table:table-row>
        <table:table-row>
          <table:table-cell table:style-name="a40" office:value-type="string">
            <text:p text:style-name="TdK">Kurumsal fatura alanları (VKN/unvan)</text:p>
          </table:table-cell>
          <table:table-cell table:style-name="a40" office:value-type="string">
            <text:p text:style-name="Td">Sipariş akışında kurumsal alan yok; B2B self-servis satış yapılamıyor.</text:p>
          </table:table-cell>
          <table:table-cell table:style-name="a40" office:value-type="string">
            <text:p text:style-name="Td">Orta</text:p>
          </table:table-cell>
        </table:table-row>
        <table:table-row>
          <table:table-cell table:style-name="a39" office:value-type="string">
            <text:p text:style-name="TdK">Toplu sipariş (20+ adet)</text:p>
          </table:table-cell>
          <table:table-cell table:style-name="a39" office:value-type="string">
            <text:p text:style-name="Td">Sepette satır başına 20 adet limiti var; kurumsal hacim self-servis karşılanamıyor.</text:p>
          </table:table-cell>
          <table:table-cell table:style-name="a39" office:value-type="string">
            <text:p text:style-name="Td">Orta</text:p>
          </table:table-cell>
        </table:table-row>
        <table:table-row>
          <table:table-cell table:style-name="a40" office:value-type="string">
            <text:p text:style-name="TdK">Sosyal kanıt (yorum/referans bölümü)</text:p>
          </table:table-cell>
          <table:table-cell table:style-name="a40" office:value-type="string">
            <text:p text:style-name="Td">Sitede müşteri yorumu/referans bölümü yok; dönüşüm oranını doğrudan etkiler.</text:p>
          </table:table-cell>
          <table:table-cell table:style-name="a40" office:value-type="string">
            <text:p text:style-name="Td">Orta</text:p>
          </table:table-cell>
        </table:table-row>
        <table:table-row>
          <table:table-cell table:style-name="a39" office:value-type="string">
            <text:p text:style-name="TdK">Meta / TikTok reklam pikselleri</text:p>
          </table:table-cell>
          <table:table-cell table:style-name="a39" office:value-type="string">
            <text:p text:style-name="Td">Canlıda çalışmıyor; performans pazarlaması ölçümü şu an yalnızca GA4/GTM ile sınırlı.</text:p>
          </table:table-cell>
          <table:table-cell table:style-name="a39" office:value-type="string">
            <text:p text:style-name="Td">Orta</text:p>
          </table:table-cell>
        </table:table-row>
        <table:table-row>
          <table:table-cell table:style-name="a40" office:value-type="string">
            <text:p text:style-name="TdK">Satıcı vitrini (pazaryeri)</text:p>
          </table:table-cell>
          <table:table-cell table:style-name="a40" office:value-type="string">
            <text:p text:style-name="Td">Satıcının tüm ürünlerini gösteren profil sayfası yok.</text:p>
          </table:table-cell>
          <table:table-cell table:style-name="a40" office:value-type="string">
            <text:p text:style-name="Td">Düşük</text:p>
          </table:table-cell>
        </table:table-row>
        <table:table-row>
          <table:table-cell table:style-name="a39" office:value-type="string">
            <text:p text:style-name="TdK">Telefon/SMS doğrulaması</text:p>
          </table:table-cell>
          <table:table-cell table:style-name="a39" office:value-type="string">
            <text:p text:style-name="Td">Kapalı; bağlı bir SMS sağlayıcısı yok.</text:p>
          </table:table-cell>
          <table:table-cell table:style-name="a39" office:value-type="string">
            <text:p text:style-name="Td">Düşük</text:p>
          </table:table-cell>
        </table:table-row>
        <table:table-row>
          <table:table-cell table:style-name="a40" office:value-type="string">
            <text:p text:style-name="TdK">Yurt dışı gönderim</text:p>
          </table:table-cell>
          <table:table-cell table:style-name="a40" office:value-type="string">
            <text:p text:style-name="Td">Yalnızca Türkiye içi teslimat.</text:p>
          </table:table-cell>
          <table:table-cell table:style-name="a40" office:value-type="string">
            <text:p text:style-name="Td">Düşük</text:p>
          </table:table-cell>
        </table:table-row>
      </table:table>
      <text:h text:style-name="H1PB" text:outline-level="1">Açık riskler ve netleştirilmesi gerekenler</text:h>
      <table:table table:name="Ca41" table:style-name="a41">
        <table:table-column table:style-name="a42"/>
        <table:table-row>
          <table:table-cell table:style-name="a43" office:value-type="string">
            <text:p text:style-name="a44">Lansman/sunum öncesi cevaplanmalı</text:p>
            <text:p text:style-name="CoBody">Bunlar ürün riskleri değil, <text:span text:style-name="B">doğrulanmamış operasyonel varsayımlardır.</text:span> Cevap alınmadan “canlıda çalışıyor” denmemelidir.</text:p>
          </table:table-cell>
        </table:table-row>
      </table:table>
      <text:list text:style-name="OL">
        <text:list-item>
          <text:p text:style-name="ListBody"><text:span text:style-name="B">Ödeme sağlayıcısı canlı modda mı?</text:span> Kod varsayılanı test modudur; doğrulanmadan “canlı ödeme alıyoruz” denemez.</text:p>
        </text:list-item>
        <text:list-item>
          <text:p text:style-name="ListBody"><text:span text:style-name="B">Kargo entegrasyonunun canlı kimlik bilgileri tanımlı mı</text:span> ve test modu kapalı mı?</text:p>
        </text:list-item>
        <text:list-item>
          <text:p text:style-name="ListBody"><text:span text:style-name="B">SMS sağlayıcısı bağlı mı?</text:span> Bağlı değilse “kargo SMS’i gönderiyoruz” vaadi kaldırılmalı.</text:p>
        </text:list-item>
        <text:list-item>
          <text:p text:style-name="ListBody"><text:span text:style-name="B">Bot koruması (Turnstile) anahtarı canlıda tanımlı mı?</text:span> Tanımlı değilse doğrulama sessizce atlanır.</text:p>
        </text:list-item>
        <text:list-item>
          <text:p text:style-name="ListBody"><text:span text:style-name="B">Yüklenen model için geometri işleme canlı sunucuda çalışıyor mu?</text:span> Çalışmıyorsa “anında otomatik fiyat” vaadi tamamen kaldırılmalı ve akış “özel teklif” olarak anlatılmalı.</text:p>
        </text:list-item>
        <text:list-item>
          <text:p text:style-name="ListBody"><text:span text:style-name="B">Gizlilik politikası kodla çelişiyor:</text:span> politika depolama sağlayıcısı, e-posta sağlayıcısı ve “izleme çerezi kullanmıyoruz” maddelerinde gerçeği yansıtmıyor; “fotoğraflar 90 gün sonra silinir” maddesi de uygulanmıyor. Hukuki risk — düzeltilmeli.</text:p>
        </text:list-item>
        <text:list-item>
          <text:p text:style-name="ListBody"><text:span text:style-name="B">Pazaryeri ödeme formunda mesafeli satış ve KVKK onay kutusu yok</text:span> — mevzuat açığı, lansman öncesi kapatılmalı.</text:p>
        </text:list-item>
        <text:list-item>
          <text:p text:style-name="ListBody"><text:span text:style-name="B">Ticari ileti izin sistemi (İYS) entegrasyonu yok</text:span> — toplu ticari e-posta/SMS göndermeden önce hukuk teyidi şart.</text:p>
        </text:list-item>
        <text:list-item>
          <text:p text:style-name="ListBody"><text:span text:style-name="B">Boyacı ödemeleri fiilen nasıl yapılıyor?</text:span> Panelde ödeme talep akışı yok.</text:p>
        </text:list-item>
        <text:list-item>
          <text:p text:style-name="ListBody"><text:span text:style-name="B">Pazaryerinde onaylı ürün var mı?</text:span> Yoksa ana sayfa rafları boş görünür — lansman öncesi ürün doldurulmalı.</text:p>
        </text:list-item>
        <text:list-item>
          <text:p text:style-name="ListBody"><text:span text:style-name="B">Sözleşmedeki “her Cuma ödeme” ifadesinin kodda karşılığı yok</text:span> — partner sözleşmesi düzeltilmeli.</text:p>
        </text:list-item>
      </text:list>
      <text:h text:style-name="H1" text:outline-level="1">İletişim</text:h>
      <table:table table:name="Ta45" table:style-name="a45">
        <table:table-column table:style-name="a46"/>
        <table:table-column table:style-name="a47"/>
        <table:table-row>
          <table:table-cell table:style-name="a49" office:value-type="string">
            <text:p text:style-name="TdK">Web</text:p>
          </table:table-cell>
          <table:table-cell table:style-name="a49" office:value-type="string">
            <text:p text:style-name="Td">figurunica.com</text:p>
          </table:table-cell>
        </table:table-row>
        <table:table-row>
          <table:table-cell table:style-name="a50" office:value-type="string">
            <text:p text:style-name="TdK">E-posta</text:p>
          </table:table-cell>
          <table:table-cell table:style-name="a50" office:value-type="string">
            <text:p text:style-name="Td">info@figurunica.com</text:p>
          </table:table-cell>
        </table:table-row>
        <table:table-row>
          <table:table-cell table:style-name="a49" office:value-type="string">
            <text:p text:style-name="TdK">Telefon / WhatsApp</text:p>
          </table:table-cell>
          <table:table-cell table:style-name="a49" office:value-type="string">
            <text:p text:style-name="Td">+90 850 840 73 03</text:p>
          </table:table-cell>
        </table:table-row>
        <table:table-row>
          <table:table-cell table:style-name="a50" office:value-type="string">
            <text:p text:style-name="TdK">Stüdyo</text:p>
          </table:table-cell>
          <table:table-cell table:style-name="a50" office:value-type="string">
            <text:p text:style-name="Td">Şehit Osman Avcı Mah., Akın 688 Sitesi B32, Etimesgut / Ankara</text:p>
          </table:table-cell>
        </table:table-row>
        <table:table-row>
          <table:table-cell table:style-name="a49" office:value-type="string">
            <text:p text:style-name="TdK">Sipariş takibi</text:p>
          </table:table-cell>
          <table:table-cell table:style-name="a49" office:value-type="string">
            <text:p text:style-name="Td">figurunica.com/track/&lt;sipariş-numarası&gt; — üyelik gerekmez</text:p>
          </table:table-cell>
        </table:table-row>
      </table:table>
      <text:p text:style-name="Note">Bu doküman canlı koddan doğrulanmış bilgilerle üretilmiştir (sürüm v1.0 · 13 Temmuz 2026). Fiyat veya politika değiştiğinde pazarlama ekibi güncel sürümü talep etmelid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meta="urn:oasis:names:tc:opendocument:xmlns:meta:1.0" xmlns:dc="http://purl.org/dc/elements/1.1/" office:version="1.3">
  <office:font-face-decls>
    <style:font-face style:name="Liberation Sans" svg:font-family="'Liberation Sans', Arial, sans-serif" style:font-family-generic="swiss" style:font-pitch="variable"/>
  </office:font-face-decls>
  <office:styles>
    <style:default-style style:family="paragraph">
      <style:paragraph-properties fo:hyphenate="false" style:line-height-at-least="0.42cm"/>
      <style:text-properties style:font-name="Liberation Sans" fo:font-size="10.5pt" fo:color="#0B0C0F" fo:language="tr" fo:country="TR"/>
    </style:default-style>
    <style:style style:name="Standard" style:family="paragraph">
      <style:paragraph-properties fo:margin-bottom="0.26cm" fo:line-height="138%"/>
      <style:text-properties style:font-name="Liberation Sans" fo:font-size="10.5pt" fo:color="#0B0C0F"/>
    </style:style>
    <style:style style:name="Body" style:family="paragraph" style:parent-style-name="Standard">
      <style:paragraph-properties fo:margin-bottom="0.26cm" fo:line-height="138%" fo:text-align="justify"/>
    </style:style>
    <style:style style:name="Lead" style:family="paragraph" style:parent-style-name="Standard">
      <style:paragraph-properties fo:margin-bottom="0.36cm" fo:line-height="146%"/>
      <style:text-properties fo:font-size="11.5pt" fo:color="#44464E"/>
    </style:style>
    <style:style style:name="Note" style:family="paragraph" style:parent-style-name="Standard">
      <style:paragraph-properties fo:margin-top="0.1cm" fo:margin-bottom="0.3cm"/>
      <style:text-properties fo:font-size="9.5pt" fo:font-style="italic" fo:color="#8A8C93"/>
    </style:style>
    <style:style style:name="H1" style:family="paragraph" style:parent-style-name="Standard">
      <style:paragraph-properties fo:margin-top="0.75cm" fo:margin-bottom="0.3cm" fo:keep-with-next="always" fo:padding-bottom="0.12cm" fo:border-bottom="1.5pt solid #00D4FF" fo:border-top="none" fo:border-left="none" fo:border-right="none"/>
      <style:text-properties fo:font-size="16.5pt" fo:font-weight="bold" fo:color="#0B3D4C"/>
    </style:style>
    <style:style style:name="H1PB" style:family="paragraph" style:parent-style-name="H1">
      <style:paragraph-properties fo:margin-top="0.75cm" fo:margin-bottom="0.3cm" fo:keep-with-next="always" fo:padding-bottom="0.12cm" fo:border-bottom="1.5pt solid #00D4FF" fo:border-top="none" fo:border-left="none" fo:border-right="none" fo:break-before="page"/>
    </style:style>
    <style:style style:name="H2" style:family="paragraph" style:parent-style-name="Standard">
      <style:paragraph-properties fo:margin-top="0.5cm" fo:margin-bottom="0.18cm" fo:keep-with-next="always"/>
      <style:text-properties fo:font-size="12pt" fo:font-weight="bold" fo:color="#0E7490"/>
    </style:style>
    <style:style style:name="ListBody" style:family="paragraph" style:parent-style-name="Standard">
      <style:paragraph-properties fo:margin-bottom="0.16cm" fo:line-height="136%"/>
    </style:style>
    <style:style style:name="Quote" style:family="paragraph" style:parent-style-name="Standard">
      <style:paragraph-properties fo:margin-left="0.5cm" fo:margin-right="0.3cm" fo:margin-top="0.25cm" fo:margin-bottom="0.35cm" fo:padding="0.32cm" fo:background-color="#F5F9FB" fo:border-left="3pt solid #0891B2" fo:border-top="none" fo:border-bottom="none" fo:border-right="none" fo:line-height="150%"/>
      <style:text-properties fo:font-size="11.5pt" fo:font-style="italic" fo:color="#0B3D4C"/>
    </style:style>
    <style:style style:name="QaQ" style:family="paragraph" style:parent-style-name="Standard">
      <style:paragraph-properties fo:margin-top="0.28cm" fo:margin-bottom="0.08cm" fo:keep-with-next="always"/>
      <style:text-properties fo:font-size="10.5pt" fo:font-weight="bold" fo:color="#0B3D4C"/>
    </style:style>
    <style:style style:name="QaA" style:family="paragraph" style:parent-style-name="Standard">
      <style:paragraph-properties fo:margin-left="0.35cm" fo:margin-bottom="0.1cm" fo:line-height="138%"/>
    </style:style>
    <style:style style:name="Th" style:family="paragraph" style:parent-style-name="Standard">
      <style:paragraph-properties fo:margin-bottom="0cm"/>
      <style:text-properties fo:font-size="9.5pt" fo:font-weight="bold" fo:color="#FFFFFF"/>
    </style:style>
    <style:style style:name="Td" style:family="paragraph" style:parent-style-name="Standard">
      <style:paragraph-properties fo:margin-bottom="0cm" fo:line-height="130%"/>
      <style:text-properties fo:font-size="9.5pt"/>
    </style:style>
    <style:style style:name="TdK" style:family="paragraph" style:parent-style-name="Standard">
      <style:paragraph-properties fo:margin-bottom="0cm" fo:line-height="130%"/>
      <style:text-properties fo:font-size="9.5pt" fo:font-weight="bold" fo:color="#0B3D4C"/>
    </style:style>
    <style:style style:name="CoTitle" style:family="paragraph" style:parent-style-name="Standard">
      <style:paragraph-properties fo:margin-bottom="0.12cm"/>
      <style:text-properties fo:font-size="10.5pt" fo:font-weight="bold"/>
    </style:style>
    <style:style style:name="CoBody" style:family="paragraph" style:parent-style-name="Standard">
      <style:paragraph-properties fo:margin-bottom="0.1cm" fo:line-height="136%"/>
      <style:text-properties fo:font-size="10pt"/>
    </style:style>
    <style:style style:name="CvLabel" style:family="paragraph" style:parent-style-name="Standard">
      <style:paragraph-properties fo:margin-bottom="0.15cm"/>
      <style:text-properties fo:font-size="9pt" fo:font-weight="bold" fo:color="#00D4FF" fo:letter-spacing="0.06cm"/>
    </style:style>
    <style:style style:name="CvNum" style:family="paragraph" style:parent-style-name="Standard">
      <style:paragraph-properties fo:margin-bottom="0.1cm"/>
      <style:text-properties fo:font-size="40pt" fo:font-weight="bold" fo:color="#00D4FF"/>
    </style:style>
    <style:style style:name="CvTitle" style:family="paragraph" style:parent-style-name="Standard">
      <style:paragraph-properties fo:margin-bottom="0.25cm"/>
      <style:text-properties fo:font-size="30pt" fo:font-weight="bold" fo:color="#FFFFFF"/>
    </style:style>
    <style:style style:name="CvSub" style:family="paragraph" style:parent-style-name="Standard">
      <style:paragraph-properties fo:margin-bottom="0.3cm" fo:line-height="140%"/>
      <style:text-properties fo:font-size="11.5pt" fo:color="#CDF6FD"/>
    </style:style>
    <style:style style:name="CvAud" style:family="paragraph" style:parent-style-name="Standard">
      <style:paragraph-properties fo:margin-bottom="0cm"/>
      <style:text-properties fo:font-size="10pt" fo:font-weight="bold" fo:color="#00D4FF"/>
    </style:style>
    <style:style style:name="CvImg" style:family="paragraph" style:parent-style-name="Standard">
      <style:paragraph-properties fo:text-align="center" fo:margin-top="0.6cm" fo:margin-bottom="0.4cm"/>
    </style:style>
    <style:style style:name="TocItem" style:family="paragraph" style:parent-style-name="Standard">
      <style:paragraph-properties fo:margin-bottom="0.12cm" fo:margin-left="0.3cm"/>
      <style:text-properties fo:font-size="10.5pt"/>
    </style:style>
    <style:style style:name="Footer" style:family="paragraph" style:parent-style-name="Standard">
      <style:paragraph-properties fo:margin-bottom="0cm" fo:text-align="center"/>
      <style:text-properties fo:font-size="8.5pt" fo:color="#8A8C93"/>
    </style:style>
    <style:style style:name="B" style:family="text">
      <style:text-properties fo:font-weight="bold" fo:color="#0B3D4C"/>
    </style:style>
    <style:style style:name="BW" style:family="text">
      <style:text-properties fo:font-weight="bold" fo:color="#FFFFFF"/>
    </style:style>
    <text:list-style style:name="UL">
      <text:list-level-style-bullet text:level="1" text:bullet-char="•">
        <style:list-level-properties text:space-before="0.35cm" text:min-label-width="0.42cm"/>
        <style:text-properties style:font-name="Liberation Sans" fo:color="#0891B2"/>
      </text:list-level-style-bullet>
      <text:list-level-style-bullet text:level="2" text:bullet-char="–">
        <style:list-level-properties text:space-before="0.85cm" text:min-label-width="0.42cm"/>
        <style:text-properties style:font-name="Liberation Sans" fo:color="#0891B2"/>
      </text:list-level-style-bullet>
    </text:list-style>
    <text:list-style style:name="OL">
      <text:list-level-style-number text:level="1" style:num-suffix="." style:num-format="1">
        <style:list-level-properties text:space-before="0.35cm" text:min-label-width="0.55cm"/>
        <style:text-properties style:font-name="Liberation Sans" fo:font-weight="bold" fo:color="#0891B2"/>
      </text:list-level-style-number>
    </text:list-style>
  </office:styles>
  <office:automatic-styles>
    <style:page-layout style:name="PL">
      <style:page-layout-properties fo:page-width="21cm" fo:page-height="29.7cm" style:print-orientation="portrait" fo:margin-top="1.9cm" fo:margin-bottom="1.7cm" fo:margin-left="2.1cm" fo:margin-right="2.1cm"/>
      <style:footer-style>
        <style:header-footer-properties fo:min-height="0.7cm" fo:margin-top="0.5cm"/>
      </style:footer-style>
    </style:page-layout>
  </office:automatic-styles>
  <office:master-styles>
    <style:master-page style:name="Standard" style:page-layout-name="PL">
      <style:footer>
        <text:p text:style-name="Footer">Figurunica · Pazarlama Kiti · v1.0 · 13 Temmuz 2026 ·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meta="urn:oasis:names:tc:opendocument:xmlns:meta:1.0" xmlns:dc="http://purl.org/dc/elements/1.1/" office:version="1.3">
  <office:meta>
    <dc:title>Figurunica — Sistem Tanıtımı</dc:title>
    <dc:subject>Hedef kitle: yatırımcı · iş ortağı · üst düzey paydaş · yeni ekip üyesi</dc:subject>
    <dc:language>tr-TR</dc:language>
    <meta:keyword>Figurunica</meta:keyword>
    <meta:keyword>pazarlama</meta:keyword>
  </office:meta>
</office:document-meta>
</file>