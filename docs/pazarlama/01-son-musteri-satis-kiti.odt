
<file path=META-INF/manifest.xml><?xml version="1.0" encoding="utf-8"?>
<manifest:manifest xmlns:manifest="urn:oasis:names:tc:opendocument:xmlns:manifest:1.0" manifest:version="1.3">
  <manifest:file-entry manifest:full-path="/" manifest:version="1.3"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Pictures/maskot.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svg="urn:oasis:names:tc:opendocument:xmlns:svg-compatible:1.0" xmlns:meta="urn:oasis:names:tc:opendocument:xmlns:meta:1.0" xmlns:dc="http://purl.org/dc/elements/1.1/" office:version="1.3">
  <office:font-face-decls>
    <style:font-face style:name="Liberation Sans" svg:font-family="'Liberation Sans', Arial, sans-serif" style:font-family-generic="swiss" style:font-pitch="variable"/>
  </office:font-face-decls>
  <office:automatic-styles>
    <style:style style:name="a1" style:family="table">
      <style:table-properties style:width="16.8cm" table:align="left" fo:margin-bottom="0.6cm"/>
    </style:style>
    <style:style style:name="a2" style:family="table-column">
      <style:table-column-properties style:column-width="16.8cm"/>
    </style:style>
    <style:style style:name="a3" style:family="table-cell">
      <style:table-cell-properties fo:background-color="#0B0C0F" fo:padding-top="1.1cm" fo:padding-bottom="1.1cm" fo:padding-left="0.9cm" fo:padding-right="0.9cm" fo:border="none"/>
    </style:style>
    <style:style style:name="a4" style:family="table">
      <style:table-properties style:width="16.0cm" table:align="left" fo:margin-top="0.15cm" fo:margin-bottom="0.4cm"/>
    </style:style>
    <style:style style:name="a5" style:family="table-column">
      <style:table-column-properties style:column-width="4.6cm"/>
    </style:style>
    <style:style style:name="a6" style:family="table-column">
      <style:table-column-properties style:column-width="11.4cm"/>
    </style:style>
    <style:style style:name="a7" style:family="table-cell">
      <style:table-cell-properties fo:background-color="#0B3D4C" fo:padding-top="0.14cm" fo:padding-bottom="0.14cm" fo:padding-left="0.2cm" fo:padding-right="0.2cm" fo:border-top="none" fo:border-right="none" fo:border-bottom="0.5pt solid #E3E7EA" fo:border-left="none" style:vertical-align="top"/>
    </style:style>
    <style:style style:name="a8" style:family="table-cell">
      <style:table-cell-properties fo:background-color="#FFFFFF" fo:padding-top="0.14cm" fo:padding-bottom="0.14cm" fo:padding-left="0.2cm" fo:padding-right="0.2cm" fo:border-top="none" fo:border-right="none" fo:border-bottom="0.5pt solid #E3E7EA" fo:border-left="none" style:vertical-align="top"/>
    </style:style>
    <style:style style:name="a9" style:family="table-cell">
      <style:table-cell-properties fo:background-color="#F5F9FB" fo:padding-top="0.14cm" fo:padding-bottom="0.14cm" fo:padding-left="0.2cm" fo:padding-right="0.2cm" fo:border-top="none" fo:border-right="none" fo:border-bottom="0.5pt solid #E3E7EA" fo:border-left="none" style:vertical-align="top"/>
    </style:style>
    <style:style style:name="a10" style:family="table">
      <style:table-properties style:width="16cm" table:align="left" fo:margin-top="0.25cm" fo:margin-bottom="0.4cm"/>
    </style:style>
    <style:style style:name="a11" style:family="table-column">
      <style:table-column-properties style:column-width="16cm"/>
    </style:style>
    <style:style style:name="a12" style:family="table-cell">
      <style:table-cell-properties fo:background-color="#FFFBEB" fo:padding="0.32cm" fo:border="none" fo:border-left="3pt solid #F59E0B"/>
    </style:style>
    <style:style style:name="a13" style:family="paragraph" style:parent-style-name="CoTitle">
      <style:text-properties fo:color="#92400E"/>
    </style:style>
    <style:style style:name="a14" style:family="table">
      <style:table-properties style:width="16.0cm" table:align="left" fo:margin-top="0.15cm" fo:margin-bottom="0.4cm"/>
    </style:style>
    <style:style style:name="a15" style:family="table-column">
      <style:table-column-properties style:column-width="4.6cm"/>
    </style:style>
    <style:style style:name="a16" style:family="table-column">
      <style:table-column-properties style:column-width="11.4cm"/>
    </style:style>
    <style:style style:name="a17" style:family="table-cell">
      <style:table-cell-properties fo:background-color="#0B3D4C" fo:padding-top="0.14cm" fo:padding-bottom="0.14cm" fo:padding-left="0.2cm" fo:padding-right="0.2cm" fo:border-top="none" fo:border-right="none" fo:border-bottom="0.5pt solid #E3E7EA" fo:border-left="none" style:vertical-align="top"/>
    </style:style>
    <style:style style:name="a18" style:family="table-cell">
      <style:table-cell-properties fo:background-color="#FFFFFF" fo:padding-top="0.14cm" fo:padding-bottom="0.14cm" fo:padding-left="0.2cm" fo:padding-right="0.2cm" fo:border-top="none" fo:border-right="none" fo:border-bottom="0.5pt solid #E3E7EA" fo:border-left="none" style:vertical-align="top"/>
    </style:style>
    <style:style style:name="a19" style:family="table-cell">
      <style:table-cell-properties fo:background-color="#F5F9FB" fo:padding-top="0.14cm" fo:padding-bottom="0.14cm" fo:padding-left="0.2cm" fo:padding-right="0.2cm" fo:border-top="none" fo:border-right="none" fo:border-bottom="0.5pt solid #E3E7EA" fo:border-left="none" style:vertical-align="top"/>
    </style:style>
    <style:style style:name="a20" style:family="table">
      <style:table-properties style:width="16.0cm" table:align="left" fo:margin-top="0.15cm" fo:margin-bottom="0.4cm"/>
    </style:style>
    <style:style style:name="a21" style:family="table-column">
      <style:table-column-properties style:column-width="3.6cm"/>
    </style:style>
    <style:style style:name="a22" style:family="table-column">
      <style:table-column-properties style:column-width="3.6cm"/>
    </style:style>
    <style:style style:name="a23" style:family="table-column">
      <style:table-column-properties style:column-width="4.4cm"/>
    </style:style>
    <style:style style:name="a24" style:family="table-column">
      <style:table-column-properties style:column-width="4.4cm"/>
    </style:style>
    <style:style style:name="a25" style:family="table-cell">
      <style:table-cell-properties fo:background-color="#0B3D4C" fo:padding-top="0.14cm" fo:padding-bottom="0.14cm" fo:padding-left="0.2cm" fo:padding-right="0.2cm" fo:border-top="none" fo:border-right="none" fo:border-bottom="0.5pt solid #E3E7EA" fo:border-left="none" style:vertical-align="top"/>
    </style:style>
    <style:style style:name="a26" style:family="table-cell">
      <style:table-cell-properties fo:background-color="#FFFFFF" fo:padding-top="0.14cm" fo:padding-bottom="0.14cm" fo:padding-left="0.2cm" fo:padding-right="0.2cm" fo:border-top="none" fo:border-right="none" fo:border-bottom="0.5pt solid #E3E7EA" fo:border-left="none" style:vertical-align="top"/>
    </style:style>
    <style:style style:name="a27" style:family="table-cell">
      <style:table-cell-properties fo:background-color="#F5F9FB" fo:padding-top="0.14cm" fo:padding-bottom="0.14cm" fo:padding-left="0.2cm" fo:padding-right="0.2cm" fo:border-top="none" fo:border-right="none" fo:border-bottom="0.5pt solid #E3E7EA" fo:border-left="none" style:vertical-align="top"/>
    </style:style>
    <style:style style:name="a28" style:family="table">
      <style:table-properties style:width="16.0cm" table:align="left" fo:margin-top="0.15cm" fo:margin-bottom="0.4cm"/>
    </style:style>
    <style:style style:name="a29" style:family="table-column">
      <style:table-column-properties style:column-width="3.8cm"/>
    </style:style>
    <style:style style:name="a30" style:family="table-column">
      <style:table-column-properties style:column-width="8.4cm"/>
    </style:style>
    <style:style style:name="a31" style:family="table-column">
      <style:table-column-properties style:column-width="3.8cm"/>
    </style:style>
    <style:style style:name="a32" style:family="table-cell">
      <style:table-cell-properties fo:background-color="#0B3D4C" fo:padding-top="0.14cm" fo:padding-bottom="0.14cm" fo:padding-left="0.2cm" fo:padding-right="0.2cm" fo:border-top="none" fo:border-right="none" fo:border-bottom="0.5pt solid #E3E7EA" fo:border-left="none" style:vertical-align="top"/>
    </style:style>
    <style:style style:name="a33" style:family="table-cell">
      <style:table-cell-properties fo:background-color="#FFFFFF" fo:padding-top="0.14cm" fo:padding-bottom="0.14cm" fo:padding-left="0.2cm" fo:padding-right="0.2cm" fo:border-top="none" fo:border-right="none" fo:border-bottom="0.5pt solid #E3E7EA" fo:border-left="none" style:vertical-align="top"/>
    </style:style>
    <style:style style:name="a34" style:family="table-cell">
      <style:table-cell-properties fo:background-color="#F5F9FB" fo:padding-top="0.14cm" fo:padding-bottom="0.14cm" fo:padding-left="0.2cm" fo:padding-right="0.2cm" fo:border-top="none" fo:border-right="none" fo:border-bottom="0.5pt solid #E3E7EA" fo:border-left="none" style:vertical-align="top"/>
    </style:style>
    <style:style style:name="a35" style:family="table">
      <style:table-properties style:width="16.0cm" table:align="left" fo:margin-top="0.15cm" fo:margin-bottom="0.4cm"/>
    </style:style>
    <style:style style:name="a36" style:family="table-column">
      <style:table-column-properties style:column-width="5.3cm"/>
    </style:style>
    <style:style style:name="a37" style:family="table-column">
      <style:table-column-properties style:column-width="5.3cm"/>
    </style:style>
    <style:style style:name="a38" style:family="table-column">
      <style:table-column-properties style:column-width="5.4cm"/>
    </style:style>
    <style:style style:name="a39" style:family="table-cell">
      <style:table-cell-properties fo:background-color="#0B3D4C" fo:padding-top="0.14cm" fo:padding-bottom="0.14cm" fo:padding-left="0.2cm" fo:padding-right="0.2cm" fo:border-top="none" fo:border-right="none" fo:border-bottom="0.5pt solid #E3E7EA" fo:border-left="none" style:vertical-align="top"/>
    </style:style>
    <style:style style:name="a40" style:family="table-cell">
      <style:table-cell-properties fo:background-color="#FFFFFF" fo:padding-top="0.14cm" fo:padding-bottom="0.14cm" fo:padding-left="0.2cm" fo:padding-right="0.2cm" fo:border-top="none" fo:border-right="none" fo:border-bottom="0.5pt solid #E3E7EA" fo:border-left="none" style:vertical-align="top"/>
    </style:style>
    <style:style style:name="a41" style:family="table-cell">
      <style:table-cell-properties fo:background-color="#F5F9FB" fo:padding-top="0.14cm" fo:padding-bottom="0.14cm" fo:padding-left="0.2cm" fo:padding-right="0.2cm" fo:border-top="none" fo:border-right="none" fo:border-bottom="0.5pt solid #E3E7EA" fo:border-left="none" style:vertical-align="top"/>
    </style:style>
    <style:style style:name="a42" style:family="table">
      <style:table-properties style:width="16.0cm" table:align="left" fo:margin-top="0.15cm" fo:margin-bottom="0.4cm"/>
    </style:style>
    <style:style style:name="a43" style:family="table-column">
      <style:table-column-properties style:column-width="10.6cm"/>
    </style:style>
    <style:style style:name="a44" style:family="table-column">
      <style:table-column-properties style:column-width="5.4cm"/>
    </style:style>
    <style:style style:name="a45" style:family="table-cell">
      <style:table-cell-properties fo:background-color="#0B3D4C" fo:padding-top="0.14cm" fo:padding-bottom="0.14cm" fo:padding-left="0.2cm" fo:padding-right="0.2cm" fo:border-top="none" fo:border-right="none" fo:border-bottom="0.5pt solid #E3E7EA" fo:border-left="none" style:vertical-align="top"/>
    </style:style>
    <style:style style:name="a46" style:family="table-cell">
      <style:table-cell-properties fo:background-color="#FFFFFF" fo:padding-top="0.14cm" fo:padding-bottom="0.14cm" fo:padding-left="0.2cm" fo:padding-right="0.2cm" fo:border-top="none" fo:border-right="none" fo:border-bottom="0.5pt solid #E3E7EA" fo:border-left="none" style:vertical-align="top"/>
    </style:style>
    <style:style style:name="a47" style:family="table-cell">
      <style:table-cell-properties fo:background-color="#F5F9FB" fo:padding-top="0.14cm" fo:padding-bottom="0.14cm" fo:padding-left="0.2cm" fo:padding-right="0.2cm" fo:border-top="none" fo:border-right="none" fo:border-bottom="0.5pt solid #E3E7EA" fo:border-left="none" style:vertical-align="top"/>
    </style:style>
    <style:style style:name="a48" style:family="table">
      <style:table-properties style:width="16.0cm" table:align="left" fo:margin-top="0.15cm" fo:margin-bottom="0.4cm"/>
    </style:style>
    <style:style style:name="a49" style:family="table-column">
      <style:table-column-properties style:column-width="10.6cm"/>
    </style:style>
    <style:style style:name="a50" style:family="table-column">
      <style:table-column-properties style:column-width="5.4cm"/>
    </style:style>
    <style:style style:name="a51" style:family="table-cell">
      <style:table-cell-properties fo:background-color="#0B3D4C" fo:padding-top="0.14cm" fo:padding-bottom="0.14cm" fo:padding-left="0.2cm" fo:padding-right="0.2cm" fo:border-top="none" fo:border-right="none" fo:border-bottom="0.5pt solid #E3E7EA" fo:border-left="none" style:vertical-align="top"/>
    </style:style>
    <style:style style:name="a52" style:family="table-cell">
      <style:table-cell-properties fo:background-color="#FFFFFF" fo:padding-top="0.14cm" fo:padding-bottom="0.14cm" fo:padding-left="0.2cm" fo:padding-right="0.2cm" fo:border-top="none" fo:border-right="none" fo:border-bottom="0.5pt solid #E3E7EA" fo:border-left="none" style:vertical-align="top"/>
    </style:style>
    <style:style style:name="a53" style:family="table-cell">
      <style:table-cell-properties fo:background-color="#F5F9FB" fo:padding-top="0.14cm" fo:padding-bottom="0.14cm" fo:padding-left="0.2cm" fo:padding-right="0.2cm" fo:border-top="none" fo:border-right="none" fo:border-bottom="0.5pt solid #E3E7EA" fo:border-left="none" style:vertical-align="top"/>
    </style:style>
    <style:style style:name="a54" style:family="table">
      <style:table-properties style:width="16.0cm" table:align="left" fo:margin-top="0.15cm" fo:margin-bottom="0.4cm"/>
    </style:style>
    <style:style style:name="a55" style:family="table-column">
      <style:table-column-properties style:column-width="3.4cm"/>
    </style:style>
    <style:style style:name="a56" style:family="table-column">
      <style:table-column-properties style:column-width="6.8cm"/>
    </style:style>
    <style:style style:name="a57" style:family="table-column">
      <style:table-column-properties style:column-width="5.8cm"/>
    </style:style>
    <style:style style:name="a58" style:family="table-cell">
      <style:table-cell-properties fo:background-color="#0B3D4C" fo:padding-top="0.14cm" fo:padding-bottom="0.14cm" fo:padding-left="0.2cm" fo:padding-right="0.2cm" fo:border-top="none" fo:border-right="none" fo:border-bottom="0.5pt solid #E3E7EA" fo:border-left="none" style:vertical-align="top"/>
    </style:style>
    <style:style style:name="a59" style:family="table-cell">
      <style:table-cell-properties fo:background-color="#FFFFFF" fo:padding-top="0.14cm" fo:padding-bottom="0.14cm" fo:padding-left="0.2cm" fo:padding-right="0.2cm" fo:border-top="none" fo:border-right="none" fo:border-bottom="0.5pt solid #E3E7EA" fo:border-left="none" style:vertical-align="top"/>
    </style:style>
    <style:style style:name="a60" style:family="table-cell">
      <style:table-cell-properties fo:background-color="#F5F9FB" fo:padding-top="0.14cm" fo:padding-bottom="0.14cm" fo:padding-left="0.2cm" fo:padding-right="0.2cm" fo:border-top="none" fo:border-right="none" fo:border-bottom="0.5pt solid #E3E7EA" fo:border-left="none" style:vertical-align="top"/>
    </style:style>
    <style:style style:name="a61" style:family="table">
      <style:table-properties style:width="16cm" table:align="left" fo:margin-top="0.25cm" fo:margin-bottom="0.4cm"/>
    </style:style>
    <style:style style:name="a62" style:family="table-column">
      <style:table-column-properties style:column-width="16cm"/>
    </style:style>
    <style:style style:name="a63" style:family="table-cell">
      <style:table-cell-properties fo:background-color="#FEF2F2" fo:padding="0.32cm" fo:border="none" fo:border-left="3pt solid #DC2626"/>
    </style:style>
    <style:style style:name="a64" style:family="paragraph" style:parent-style-name="CoTitle">
      <style:text-properties fo:color="#B91C1C"/>
    </style:style>
    <style:style style:name="a65" style:family="table">
      <style:table-properties style:width="16.0cm" table:align="left" fo:margin-top="0.15cm" fo:margin-bottom="0.4cm"/>
    </style:style>
    <style:style style:name="a66" style:family="table-column">
      <style:table-column-properties style:column-width="4.6cm"/>
    </style:style>
    <style:style style:name="a67" style:family="table-column">
      <style:table-column-properties style:column-width="11.4cm"/>
    </style:style>
    <style:style style:name="a68" style:family="table-cell">
      <style:table-cell-properties fo:background-color="#0B3D4C" fo:padding-top="0.14cm" fo:padding-bottom="0.14cm" fo:padding-left="0.2cm" fo:padding-right="0.2cm" fo:border-top="none" fo:border-right="none" fo:border-bottom="0.5pt solid #E3E7EA" fo:border-left="none" style:vertical-align="top"/>
    </style:style>
    <style:style style:name="a69" style:family="table-cell">
      <style:table-cell-properties fo:background-color="#FFFFFF" fo:padding-top="0.14cm" fo:padding-bottom="0.14cm" fo:padding-left="0.2cm" fo:padding-right="0.2cm" fo:border-top="none" fo:border-right="none" fo:border-bottom="0.5pt solid #E3E7EA" fo:border-left="none" style:vertical-align="top"/>
    </style:style>
    <style:style style:name="a70" style:family="table-cell">
      <style:table-cell-properties fo:background-color="#F5F9FB" fo:padding-top="0.14cm" fo:padding-bottom="0.14cm" fo:padding-left="0.2cm" fo:padding-right="0.2cm" fo:border-top="none" fo:border-right="none" fo:border-bottom="0.5pt solid #E3E7EA" fo:border-left="none" style:vertical-align="top"/>
    </style:style>
  </office:automatic-styles>
  <office:body>
    <office:text>
      <table:table table:name="Cover" table:style-name="a1">
        <table:table-column table:style-name="a2"/>
        <table:table-row>
          <table:table-cell table:style-name="a3" office:value-type="string">
            <text:p text:style-name="CvLabel">FIGURUNICA · PAZARLAMA KİTİ</text:p>
            <text:p text:style-name="CvNum">01</text:p>
            <text:p text:style-name="CvTitle">Son Müşteri Satış Kiti</text:p>
            <text:p text:style-name="CvSub">Fotoğraftan kişiye özel 3D figür, hazır ürün mağazası ve kendi 3D dosyanı bastırma — ürün, fiyat, süreç ve itiraz karşılama.</text:p>
            <text:p text:style-name="CvImg"><draw:frame draw:name="maskot" text:anchor-type="as-char" svg:width="3.1cm" svg:height="3.1cm" draw:z-index="0"><draw:image xlink:href="Pictures/maskot.png" xlink:type="simple" xlink:show="embed" xlink:actuate="onLoad"/></draw:frame></text:p>
            <text:p text:style-name="CvAud">Hedef kitle: bireysel müşteri · hediye alıcısı · mağaza müşterisi · maker</text:p>
          </table:table-cell>
        </table:table-row>
      </table:table>
      <table:table table:name="Ta4" table:style-name="a4">
        <table:table-column table:style-name="a5"/>
        <table:table-column table:style-name="a6"/>
        <table:table-row>
          <table:table-cell table:style-name="a8" office:value-type="string">
            <text:p text:style-name="TdK">Doküman</text:p>
          </table:table-cell>
          <table:table-cell table:style-name="a8" office:value-type="string">
            <text:p text:style-name="Td">01 — Son Müşteri Satış Kiti</text:p>
          </table:table-cell>
        </table:table-row>
        <table:table-row>
          <table:table-cell table:style-name="a9" office:value-type="string">
            <text:p text:style-name="TdK">Sürüm</text:p>
          </table:table-cell>
          <table:table-cell table:style-name="a9" office:value-type="string">
            <text:p text:style-name="Td">v1.0 · 13 Temmuz 2026</text:p>
          </table:table-cell>
        </table:table-row>
        <table:table-row>
          <table:table-cell table:style-name="a8" office:value-type="string">
            <text:p text:style-name="TdK">Kaynak</text:p>
          </table:table-cell>
          <table:table-cell table:style-name="a8" office:value-type="string">
            <text:p text:style-name="Td">Canlı ürün kodundan doğrulanmış bilgiler (9 alan, 311 bulgu)</text:p>
          </table:table-cell>
        </table:table-row>
        <table:table-row>
          <table:table-cell table:style-name="a9" office:value-type="string">
            <text:p text:style-name="TdK">Kullanım</text:p>
          </table:table-cell>
          <table:table-cell table:style-name="a9" office:value-type="string">
            <text:p text:style-name="Td">İç kullanım — pazarlama ve satış ekibi</text:p>
          </table:table-cell>
        </table:table-row>
      </table:table>
      <table:table table:name="Ca10" table:style-name="a10">
        <table:table-column table:style-name="a11"/>
        <table:table-row>
          <table:table-cell table:style-name="a12" office:value-type="string">
            <text:p text:style-name="a13">Bu doküman müşteriye/partnere olduğu gibi verilmez.</text:p>
            <text:p text:style-name="CoBody">İçinde “asla söylemeyin” bölümü ve netleştirilmemiş operasyonel sorular vardır. Dışarıya çıkacak materyali bu dokümandan <text:span text:style-name="B">üretin</text:span>, dokümanı <text:span text:style-name="B">paylaşmayın</text:span>.</text:p>
          </table:table-cell>
        </table:table-row>
      </table:table>
      <text:p text:style-name="H1PB">İçindekiler</text:p>
      <text:p text:style-name="TocItem">1.  Bir bakışta Figurunica</text:p>
      <text:p text:style-name="TocItem">2.  30 saniyelik konuşma</text:p>
      <text:p text:style-name="TocItem">3.  Ürünler ve fiyatlar</text:p>
      <text:p text:style-name="TocItem">4.  Müşteri yolculuğu — 12 adım</text:p>
      <text:p text:style-name="TocItem">5.  Neden Figurunica — satışta kullanılacak 8 argüman</text:p>
      <text:p text:style-name="TocItem">6.  İtiraz karşılama</text:p>
      <text:p text:style-name="TocItem">7.  Sık sorulan sorular (sitedeki resmî cevaplar)</text:p>
      <text:p text:style-name="TocItem">8.  Asla söylemeyin</text:p>
      <text:p text:style-name="TocItem">9.  Kampanya öncesi netleştirilecekler</text:p>
      <text:p text:style-name="TocItem">10.  İletişim</text:p>
      <text:h text:style-name="H1" text:outline-level="1">Bir bakışta Figurunica</text:h>
      <text:p text:style-name="Lead">Figurunica, fotoğrafından kişiye özel 3D baskı figür üreten bir üretim stüdyosu ve aynı zamanda onaylı üreticilerin hazır ürünlerini sattığı bir 3D pazaryeridir. Müşteri fotoğrafını yükler, yapay zekâ iki stilize tasarım seçeneği üretir, müşteri beğendiğini seçer; ekip o tasarımdan 3D modeli hazırlar, partner atölye basar, ürün fotoğraflı kalite kontrolünden geçer ve boyama kitiyle birlikte kargolanır.</text:p>
      <table:table table:name="Ta14" table:style-name="a14">
        <table:table-column table:style-name="a15"/>
        <table:table-column table:style-name="a16"/>
        <table:table-row>
          <table:table-cell table:style-name="a18" office:value-type="string">
            <text:p text:style-name="TdK">Ne satıyoruz</text:p>
          </table:table-cell>
          <table:table-cell table:style-name="a18" office:value-type="string">
            <text:p text:style-name="Td">Kişiye özel figür · 2D tasarım/logodan ürün · kendi STL/OBJ dosyanı bastırma · hazır ürün mağazası · anahtarlık/magnet/gece lambası</text:p>
          </table:table-cell>
        </table:table-row>
        <table:table-row>
          <table:table-cell table:style-name="a19" office:value-type="string">
            <text:p text:style-name="TdK">Başlangıç fiyatı</text:p>
          </table:table-cell>
          <table:table-cell table:style-name="a19" office:value-type="string">
            <text:p text:style-name="Td">Filament ₺899 · Reçine ₺999 (KDV dahil)</text:p>
          </table:table-cell>
        </table:table-row>
        <table:table-row>
          <table:table-cell table:style-name="a18" office:value-type="string">
            <text:p text:style-name="TdK">Kargo</text:p>
          </table:table-cell>
          <table:table-cell table:style-name="a18" office:value-type="string">
            <text:p text:style-name="Td">Türkiye içi ücretsiz — sipariş toplamına kargo bedeli eklenmez</text:p>
          </table:table-cell>
        </table:table-row>
        <table:table-row>
          <table:table-cell table:style-name="a19" office:value-type="string">
            <text:p text:style-name="TdK">Üyelik</text:p>
          </table:table-cell>
          <table:table-cell table:style-name="a19" office:value-type="string">
            <text:p text:style-name="Td">Sipariş için gerekmez (misafir checkout). Sadece ücretsiz AI tasarım üretimi giriş ister</text:p>
          </table:table-cell>
        </table:table-row>
        <table:table-row>
          <table:table-cell table:style-name="a18" office:value-type="string">
            <text:p text:style-name="TdK">Teslim</text:p>
          </table:table-cell>
          <table:table-cell table:style-name="a18" office:value-type="string">
            <text:p text:style-name="Td">Onaydan sonra 5–7 iş günü üretim + 2–3 iş günü kargo (tahmini, garanti değil)</text:p>
          </table:table-cell>
        </table:table-row>
        <table:table-row>
          <table:table-cell table:style-name="a19" office:value-type="string">
            <text:p text:style-name="TdK">Ödeme</text:p>
          </table:table-cell>
          <table:table-cell table:style-name="a19" office:value-type="string">
            <text:p text:style-name="Td">Kart (PayTR 3D Secure) veya Havale/EFT — havalede %3 indirim</text:p>
          </table:table-cell>
        </table:table-row>
        <table:table-row>
          <table:table-cell table:style-name="a18" office:value-type="string">
            <text:p text:style-name="TdK">Takip</text:p>
          </table:table-cell>
          <table:table-cell table:style-name="a18" office:value-type="string">
            <text:p text:style-name="Td">figurunica.com/track/&lt;sipariş-no&gt; — üyeliksiz, canlı güncellenen 8 adımlı takip</text:p>
          </table:table-cell>
        </table:table-row>
        <table:table-row>
          <table:table-cell table:style-name="a19" office:value-type="string">
            <text:p text:style-name="TdK">Güvence</text:p>
          </table:table-cell>
          <table:table-cell table:style-name="a19" office:value-type="string">
            <text:p text:style-name="Td">Baskı, müşteri tasarımı onaylamadan başlamaz + kargodan önce fotoğraflı kalite kontrol</text:p>
          </table:table-cell>
        </table:table-row>
      </table:table>
      <text:h text:style-name="H1" text:outline-level="1">30 saniyelik konuşma</text:h>
      <text:p text:style-name="Body">Bu metni ezberleyin. Her rakamı doğrulanmıştır; üzerine bir şey eklemeyin.</text:p>
      <text:p text:style-name="Quote">“Bir fotoğraf yükleyin — yapay zekâ size iki farklı stilize tasarım seçeneği çıkarsın, beğendiğinizi siz seçin. Siz onaylamadan hiçbir şey basılmaz. Onayınızdan sonra ekibimiz 3D modeli hazırlar, partner atölyelerimiz reçine ya da filamentle basar, ürün fotoğraflı kalite kontrolünden geçer ve boya kitiyle birlikte kapınıza gelir. Fiyatlar filamentte ₺899, reçinede ₺999’dan başlar; KDV dahil, Türkiye içi kargo ücretsiz ve üye olmanıza bile gerek yok. Siparişinizi numaranızla, üye olmadan, canlı takip edersiniz.”</text:p>
      <text:h text:style-name="H1" text:outline-level="1">Ürünler ve fiyatlar</text:h>
      <text:p text:style-name="Note">Tüm fiyatlar KDV dahildir ve ödemeden önce müşteriye net gösterilir. Sürpriz ek ücret yoktur. Türkiye içi kargo ücretsizdir.</text:p>
      <text:h text:style-name="H2" text:outline-level="2">Fotoğraftan kişiye özel figür</text:h>
      <table:table table:name="Ta20" table:style-name="a20">
        <table:table-column table:style-name="a21"/>
        <table:table-column table:style-name="a22"/>
        <table:table-column table:style-name="a23"/>
        <table:table-column table:style-name="a24"/>
        <table:table-header-rows>
          <table:table-row>
            <table:table-cell table:style-name="a25" office:value-type="string">
              <text:p text:style-name="Th">Boyut</text:p>
            </table:table-cell>
            <table:table-cell table:style-name="a25" office:value-type="string">
              <text:p text:style-name="Th">Yaklaşık ölçü</text:p>
            </table:table-cell>
            <table:table-cell table:style-name="a25" office:value-type="string">
              <text:p text:style-name="Th">Reçine (SLA)</text:p>
            </table:table-cell>
            <table:table-cell table:style-name="a25" office:value-type="string">
              <text:p text:style-name="Th">Filament (FDM)</text:p>
            </table:table-cell>
          </table:table-row>
        </table:table-header-rows>
        <table:table-row>
          <table:table-cell table:style-name="a26" office:value-type="string">
            <text:p text:style-name="TdK">Küçük</text:p>
          </table:table-cell>
          <table:table-cell table:style-name="a26" office:value-type="string">
            <text:p text:style-name="Td">~60 mm</text:p>
          </table:table-cell>
          <table:table-cell table:style-name="a26" office:value-type="string">
            <text:p text:style-name="Td">₺999</text:p>
          </table:table-cell>
          <table:table-cell table:style-name="a26" office:value-type="string">
            <text:p text:style-name="Td">₺899</text:p>
          </table:table-cell>
        </table:table-row>
        <table:table-row>
          <table:table-cell table:style-name="a27" office:value-type="string">
            <text:p text:style-name="TdK">Orta (varsayılan)</text:p>
          </table:table-cell>
          <table:table-cell table:style-name="a27" office:value-type="string">
            <text:p text:style-name="Td">~80 mm</text:p>
          </table:table-cell>
          <table:table-cell table:style-name="a27" office:value-type="string">
            <text:p text:style-name="Td">₺1.399</text:p>
          </table:table-cell>
          <table:table-cell table:style-name="a27" office:value-type="string">
            <text:p text:style-name="Td">₺1.199</text:p>
          </table:table-cell>
        </table:table-row>
        <table:table-row>
          <table:table-cell table:style-name="a26" office:value-type="string">
            <text:p text:style-name="TdK">Büyük</text:p>
          </table:table-cell>
          <table:table-cell table:style-name="a26" office:value-type="string">
            <text:p text:style-name="Td">~120 mm</text:p>
          </table:table-cell>
          <table:table-cell table:style-name="a26" office:value-type="string">
            <text:p text:style-name="Td">₺1.799</text:p>
          </table:table-cell>
          <table:table-cell table:style-name="a26" office:value-type="string">
            <text:p text:style-name="Td">₺1.499</text:p>
          </table:table-cell>
        </table:table-row>
      </table:table>
      <text:p text:style-name="Body"><text:span text:style-name="B">Reçine (SLA):</text:span> yüksek detay, pürüzsüz premium yüzey. <text:span text:style-name="B">Filament (FDM):</text:span> ekonomik alternatif. Seçim müşterinin.</text:p>
      <text:h text:style-name="H2" text:outline-level="2">Bitiş paketleri (figür fiyatının üzerine)</text:h>
      <table:table table:name="Ta28" table:style-name="a28">
        <table:table-column table:style-name="a29"/>
        <table:table-column table:style-name="a30"/>
        <table:table-column table:style-name="a31"/>
        <table:table-header-rows>
          <table:table-row>
            <table:table-cell table:style-name="a32" office:value-type="string">
              <text:p text:style-name="Th">Paket</text:p>
            </table:table-cell>
            <table:table-cell table:style-name="a32" office:value-type="string">
              <text:p text:style-name="Th">İçerik</text:p>
            </table:table-cell>
            <table:table-cell table:style-name="a32" office:value-type="string">
              <text:p text:style-name="Th">Fiyat farkı</text:p>
            </table:table-cell>
          </table:table-row>
        </table:table-header-rows>
        <table:table-row>
          <table:table-cell table:style-name="a33" office:value-type="string">
            <text:p text:style-name="TdK">Boyanabilir Kit<text:line-break/>(varsayılan)</text:p>
          </table:table-cell>
          <table:table-cell table:style-name="a33" office:value-type="string">
            <text:p text:style-name="Td">Zımparalı + astarlı baskı, 6 akrilik boya, 2 fırça (orta yuvarlak + ince detay), karıştırma paleti, adım adım boyama rehberi</text:p>
          </table:table-cell>
          <table:table-cell table:style-name="a33" office:value-type="string">
            <text:p text:style-name="Td">Fiyata dahil (+₺0)</text:p>
          </table:table-cell>
        </table:table-row>
        <table:table-row>
          <table:table-cell table:style-name="a34" office:value-type="string">
            <text:p text:style-name="TdK">Collector Raw</text:p>
          </table:table-cell>
          <table:table-cell table:style-name="a34" office:value-type="string">
            <text:p text:style-name="Td">Boyasız, yüksek detaylı reçine. Boya kiti yok.</text:p>
          </table:table-cell>
          <table:table-cell table:style-name="a34" office:value-type="string">
            <text:p text:style-name="Td">−₺100 (indirim)</text:p>
          </table:table-cell>
        </table:table-row>
        <table:table-row>
          <table:table-cell table:style-name="a33" office:value-type="string">
            <text:p text:style-name="TdK">El Boyaması</text:p>
          </table:table-cell>
          <table:table-cell table:style-name="a33" office:value-type="string">
            <text:p text:style-name="Td">Profesyonel el boyama, kalite kontrol fotoğrafı, hediye kutusu</text:p>
          </table:table-cell>
          <table:table-cell table:style-name="a33" office:value-type="string">
            <text:p text:style-name="Td">+₺1.000</text:p>
          </table:table-cell>
        </table:table-row>
        <table:table-row>
          <table:table-cell table:style-name="a34" office:value-type="string">
            <text:p text:style-name="TdK">Lüks Vitrin</text:p>
          </table:table-cell>
          <table:table-cell table:style-name="a34" office:value-type="string">
            <text:p text:style-name="Td">Premium kaide, isim plakası, sert kutu, tam el boyaması</text:p>
          </table:table-cell>
          <table:table-cell table:style-name="a34" office:value-type="string">
            <text:p text:style-name="Td">+₺2.000</text:p>
          </table:table-cell>
        </table:table-row>
      </table:table>
      <text:h text:style-name="H2" text:outline-level="2">2D tasarım / obje → ürün (logo, çizim, düz görsel, nesne fotoğrafı)</text:h>
      <table:table table:name="Ta35" table:style-name="a35">
        <table:table-column table:style-name="a36"/>
        <table:table-column table:style-name="a37"/>
        <table:table-column table:style-name="a38"/>
        <table:table-header-rows>
          <table:table-row>
            <table:table-cell table:style-name="a39" office:value-type="string">
              <text:p text:style-name="Th">Boyut</text:p>
            </table:table-cell>
            <table:table-cell table:style-name="a39" office:value-type="string">
              <text:p text:style-name="Th">Reçine</text:p>
            </table:table-cell>
            <table:table-cell table:style-name="a39" office:value-type="string">
              <text:p text:style-name="Th">Filament</text:p>
            </table:table-cell>
          </table:table-row>
        </table:table-header-rows>
        <table:table-row>
          <table:table-cell table:style-name="a40" office:value-type="string">
            <text:p text:style-name="TdK">Küçük</text:p>
          </table:table-cell>
          <table:table-cell table:style-name="a40" office:value-type="string">
            <text:p text:style-name="Td">₺799</text:p>
          </table:table-cell>
          <table:table-cell table:style-name="a40" office:value-type="string">
            <text:p text:style-name="Td">₺549</text:p>
          </table:table-cell>
        </table:table-row>
        <table:table-row>
          <table:table-cell table:style-name="a41" office:value-type="string">
            <text:p text:style-name="TdK">Orta</text:p>
          </table:table-cell>
          <table:table-cell table:style-name="a41" office:value-type="string">
            <text:p text:style-name="Td">₺1.099</text:p>
          </table:table-cell>
          <table:table-cell table:style-name="a41" office:value-type="string">
            <text:p text:style-name="Td">₺849</text:p>
          </table:table-cell>
        </table:table-row>
        <table:table-row>
          <table:table-cell table:style-name="a40" office:value-type="string">
            <text:p text:style-name="TdK">Büyük</text:p>
          </table:table-cell>
          <table:table-cell table:style-name="a40" office:value-type="string">
            <text:p text:style-name="Td">₺1.499</text:p>
          </table:table-cell>
          <table:table-cell table:style-name="a40" office:value-type="string">
            <text:p text:style-name="Td">₺1.199</text:p>
          </table:table-cell>
        </table:table-row>
      </table:table>
      <text:p text:style-name="Body">Obje bitişleri: <text:span text:style-name="B">Ham baskı</text:span> +₺0 · <text:span text:style-name="B">Pürüzsüz</text:span> (zımpara + astar) +₺150 · <text:span text:style-name="B">Boyalı</text:span> (tek renk, temel boyama) +₺400.</text:p>
      <text:h text:style-name="H2" text:outline-level="2">Creative Lab hediyelikler (figurunica.com/urunler)</text:h>
      <table:table table:name="Ta42" table:style-name="a42">
        <table:table-column table:style-name="a43"/>
        <table:table-column table:style-name="a44"/>
        <table:table-header-rows>
          <table:table-row>
            <table:table-cell table:style-name="a45" office:value-type="string">
              <text:p text:style-name="Th">Ürün</text:p>
            </table:table-cell>
            <table:table-cell table:style-name="a45" office:value-type="string">
              <text:p text:style-name="Th">Fiyat</text:p>
            </table:table-cell>
          </table:table-row>
        </table:table-header-rows>
        <table:table-row>
          <table:table-cell table:style-name="a46" office:value-type="string">
            <text:p text:style-name="TdK">Anahtarlık</text:p>
          </table:table-cell>
          <table:table-cell table:style-name="a46" office:value-type="string">
            <text:p text:style-name="Td">₺149</text:p>
          </table:table-cell>
        </table:table-row>
        <table:table-row>
          <table:table-cell table:style-name="a47" office:value-type="string">
            <text:p text:style-name="TdK">Buzdolabı magneti</text:p>
          </table:table-cell>
          <table:table-cell table:style-name="a47" office:value-type="string">
            <text:p text:style-name="Td">₺129</text:p>
          </table:table-cell>
        </table:table-row>
        <table:table-row>
          <table:table-cell table:style-name="a46" office:value-type="string">
            <text:p text:style-name="TdK">Gece lambası</text:p>
          </table:table-cell>
          <table:table-cell table:style-name="a46" office:value-type="string">
            <text:p text:style-name="Td">₺399</text:p>
          </table:table-cell>
        </table:table-row>
      </table:table>
      <text:p text:style-name="Note">Sabit fiyatlıdır; boyut/malzeme/bitiş seçimi yoktur. Fotoğraftan üretilir ve sitede normal ödemeyle satın alınır. Bu ürünler /create tasarım ızgarasında görünmez, yalnızca /urunler sayfasından satılır.</text:p>
      <text:h text:style-name="H2" text:outline-level="2">Kendi 3D dosyanı bastır (STL / OBJ)</text:h>
      <text:list text:style-name="UL">
        <text:list-item>
          <text:p text:style-name="ListBody"><text:span text:style-name="B">Dosya:</text:span> STL veya OBJ, en fazla 50 MB. <text:span text:style-name="B">Yükseklik:</text:span> 40 / 60 / 80 / 120 / 160 mm. <text:span text:style-name="B">Malzeme:</text:span> reçine veya filament.</text:p>
        </text:list-item>
        <text:list-item>
          <text:p text:style-name="ListBody"><text:span text:style-name="B">Fiyat formülü açıktır:</text:span> Reçine ₺99 baz + ₺15/cm³ (en az ₺199) · Filament ₺69 baz + ₺9/cm³ (en az ₺149). Üzerine bitiş: Ham +₺0 · Pürüzsüz +₺150 · Boyalı +₺400.</text:p>
        </text:list-item>
        <text:list-item>
          <text:p text:style-name="ListBody"><text:span text:style-name="B">Baskı zarfı 220 × 220 × 250 mm.</text:span> Zarfı aşan, kapalı hacim oluşturmayan veya otomatik fiyatı ₺50.000’i geçen modeller reddedilmez — ekip elle özel teklif hazırlar (teklif 7 gün geçerli).</text:p>
        </text:list-item>
        <text:list-item>
          <text:p text:style-name="ListBody">Bu yolda AI yoktur, üyelik gerekmez. Sipariş “Modeliniz Hazırlanıyor” adımını atlar, doğrudan üretime girer.</text:p>
        </text:list-item>
      </text:list>
      <text:h text:style-name="H2" text:outline-level="2">Ek hizmetler (ödeme adımında seçilir)</text:h>
      <table:table table:name="Ta48" table:style-name="a48">
        <table:table-column table:style-name="a49"/>
        <table:table-column table:style-name="a50"/>
        <table:table-header-rows>
          <table:table-row>
            <table:table-cell table:style-name="a51" office:value-type="string">
              <text:p text:style-name="Th">Ek hizmet</text:p>
            </table:table-cell>
            <table:table-cell table:style-name="a51" office:value-type="string">
              <text:p text:style-name="Th">Fiyat</text:p>
            </table:table-cell>
          </table:table-row>
        </table:table-header-rows>
        <table:table-row>
          <table:table-cell table:style-name="a52" office:value-type="string">
            <text:p text:style-name="TdK">Ekstra boya katmanı</text:p>
          </table:table-cell>
          <table:table-cell table:style-name="a52" office:value-type="string">
            <text:p text:style-name="Td">₺49</text:p>
          </table:table-cell>
        </table:table-row>
        <table:table-row>
          <table:table-cell table:style-name="a53" office:value-type="string">
            <text:p text:style-name="TdK">Hediye paketi (kraft kutu + kurdele)</text:p>
          </table:table-cell>
          <table:table-cell table:style-name="a53" office:value-type="string">
            <text:p text:style-name="Td">₺29</text:p>
          </table:table-cell>
        </table:table-row>
        <table:table-row>
          <table:table-cell table:style-name="a52" office:value-type="string">
            <text:p text:style-name="TdK">Hızlı kargo (üretim sonrası 1–2 iş günü)</text:p>
          </table:table-cell>
          <table:table-cell table:style-name="a52" office:value-type="string">
            <text:p text:style-name="Td">₺79</text:p>
          </table:table-cell>
        </table:table-row>
        <table:table-row>
          <table:table-cell table:style-name="a53" office:value-type="string">
            <text:p text:style-name="TdK">Dijital dosyalar (STL + OBJ indirme)</text:p>
          </table:table-cell>
          <table:table-cell table:style-name="a53" office:value-type="string">
            <text:p text:style-name="Td">₺99</text:p>
          </table:table-cell>
        </table:table-row>
      </table:table>
      <text:h text:style-name="H2" text:outline-level="2">Hazır ürün mağazası (figurunica.com/shop)</text:h>
      <text:list text:style-name="UL">
        <text:list-item>
          <text:p text:style-name="ListBody">Yalnızca <text:span text:style-name="B">admin onayından geçmiş</text:span> ürünler satılır; her ürün <text:span text:style-name="B">siparişe özel üretilir</text:span> — stok kavramı yoktur.</text:p>
        </text:list-item>
        <text:list-item>
          <text:p text:style-name="ListBody">Filtreler: kategori, ürün adında arama, malzeme (reçine/filament), fiyat aralığı, sıralama. Sayfa başına 24 ürün.</text:p>
        </text:list-item>
        <text:list-item>
          <text:p text:style-name="ListBody">Ürün sayfasında: fotoğraf galerisi, açıklama, malzeme, <text:span text:style-name="B">teslim süresi</text:span>, satıcı firma adı, kutu içeriği, puan/yorum ve en fazla 6 benzer ürün.</text:p>
        </text:list-item>
        <text:list-item>
          <text:p text:style-name="ListBody"><text:span text:style-name="B">Sahte yorum imkânsız:</text:span> yorumu yalnızca o ürünü satın alıp <text:span text:style-name="B">teslim almış</text:span> kayıtlı müşteri, ürün başına bir kez yazabilir.</text:p>
        </text:list-item>
        <text:list-item>
          <text:p text:style-name="ListBody">Farklı satıcıların ürünleri tek sepette, tek ödemeyle alınır; sipariş arka planda satıcı bazında bölünür. Sepet 30 gün saklanır (misafirde bile), satır başına en fazla 20 adet.</text:p>
        </text:list-item>
        <text:list-item>
          <text:p text:style-name="ListBody">Fiyatı satıcı belirler (KDV dahil). Sepet sayfasında “WhatsApp’tan Sipariş Ver” butonu vardır.</text:p>
        </text:list-item>
      </text:list>
      <text:h text:style-name="H1PB" text:outline-level="1">Müşteri yolculuğu — 12 adım</text:h>
      <table:table table:name="Ta54" table:style-name="a54">
        <table:table-column table:style-name="a55"/>
        <table:table-column table:style-name="a56"/>
        <table:table-column table:style-name="a57"/>
        <table:table-header-rows>
          <table:table-row>
            <table:table-cell table:style-name="a58" office:value-type="string">
              <text:p text:style-name="Th">Adım</text:p>
            </table:table-cell>
            <table:table-cell table:style-name="a58" office:value-type="string">
              <text:p text:style-name="Th">Ne oluyor</text:p>
            </table:table-cell>
            <table:table-cell table:style-name="a58" office:value-type="string">
              <text:p text:style-name="Th">Müşteriye verilen söz</text:p>
            </table:table-cell>
          </table:table-row>
        </table:table-header-rows>
        <table:table-row>
          <table:table-cell table:style-name="a59" office:value-type="string">
            <text:p text:style-name="TdK">1. Yol seç</text:p>
          </table:table-cell>
          <table:table-cell table:style-name="a59" office:value-type="string">
            <text:p text:style-name="Td">Üç giriş yolu: fotoğraftan üret · 2D tasarım → ürün · kendi 3D dosyam (STL/OBJ).</text:p>
          </table:table-cell>
          <table:table-cell table:style-name="a59" office:value-type="string">
            <text:p text:style-name="Td">Ne elinizde varsa ondan başlayın.</text:p>
          </table:table-cell>
        </table:table-row>
        <table:table-row>
          <table:table-cell table:style-name="a60" office:value-type="string">
            <text:p text:style-name="TdK">2. Boyut &amp; fotoğraf</text:p>
          </table:table-cell>
          <table:table-cell table:style-name="a60" office:value-type="string">
            <text:p text:style-name="Td">Boyut, malzeme ve 7 tasarım deseninden biri seçilir; JPG/PNG (en fazla 10 MB) yüklenir, tarayıcı içi kırpma editörü açılır. Arka plan kendi sunucumuzda temizlenir.</text:p>
          </table:table-cell>
          <table:table-cell table:style-name="a60" office:value-type="string">
            <text:p text:style-name="Td">Tek net fotoğraf yeter.</text:p>
          </table:table-cell>
        </table:table-row>
        <table:table-row>
          <table:table-cell table:style-name="a59" office:value-type="string">
            <text:p text:style-name="TdK">3. Önizleme</text:p>
          </table:table-cell>
          <table:table-cell table:style-name="a59" office:value-type="string">
            <text:p text:style-name="Td">AI tam <text:span text:style-name="B">2</text:span> stilize 2D görsel üretir (genellikle bir dakikadan kısa). Beğenilmezse “yeni seçenekler üret” — toplam <text:span text:style-name="B">4 tura</text:span> kadar.</text:p>
          </table:table-cell>
          <table:table-cell table:style-name="a59" office:value-type="string">
            <text:p text:style-name="Td">Sipariş vermeden önce nasıl görüneceğini görün.</text:p>
          </table:table-cell>
        </table:table-row>
        <table:table-row>
          <table:table-cell table:style-name="a60" office:value-type="string">
            <text:p text:style-name="TdK">4. Onay</text:p>
          </table:table-cell>
          <table:table-cell table:style-name="a60" office:value-type="string">
            <text:p text:style-name="Td">Müşteri görseli onaylar ya da 1.000 karaktere kadar not bırakıp revizyon ister; ekip inceleyip e-postayla döner.</text:p>
          </table:table-cell>
          <table:table-cell table:style-name="a60" office:value-type="string">
            <text:p text:style-name="Td">Siz onaylamadan baskı başlamaz.</text:p>
          </table:table-cell>
        </table:table-row>
        <table:table-row>
          <table:table-cell table:style-name="a59" office:value-type="string">
            <text:p text:style-name="TdK">5. Ödeme</text:p>
          </table:table-cell>
          <table:table-cell table:style-name="a59" office:value-type="string">
            <text:p text:style-name="Td">Misafir olarak ad-soyad + e-posta ile ödeme. Bitiş paketi, ek hizmetler ve hediye kartı kodu burada girilir. Kart (PayTR 3D Secure) veya Havale/EFT (%3 indirim, 72 saat).</text:p>
          </table:table-cell>
          <table:table-cell table:style-name="a59" office:value-type="string">
            <text:p text:style-name="Td">Fiyat ödemeden önce net gösterilir; sürpriz ek ücret yok.</text:p>
          </table:table-cell>
        </table:table-row>
        <table:table-row>
          <table:table-cell table:style-name="a60" office:value-type="string">
            <text:p text:style-name="TdK">6. Model hazırlığı</text:p>
          </table:table-cell>
          <table:table-cell table:style-name="a60" office:value-type="string">
            <text:p text:style-name="Td">Sipariş “Modeliniz Hazırlanıyor” durumuna geçer; ekip onaylı tasarımdan 3D modeli hazırlayıp yükler. Kendi dosyasını yükleyenler bu adımı atlar.</text:p>
          </table:table-cell>
          <table:table-cell table:style-name="a60" office:value-type="string">
            <text:p text:style-name="Td">3D modeliniz makineye bırakılmaz — ekibimiz hazırlar.</text:p>
          </table:table-cell>
        </table:table-row>
        <table:table-row>
          <table:table-cell table:style-name="a59" office:value-type="string">
            <text:p text:style-name="TdK">7. Baskı</text:p>
          </table:table-cell>
          <table:table-cell table:style-name="a59" office:value-type="string">
            <text:p text:style-name="Td">Sipariş; malzemesine uyan, kapasitesi olan ve mümkün olduğunca müşteriye yakın partner atölyeye yönlendirilir. Atölye kabul eder ve basar.</text:p>
          </table:table-cell>
          <table:table-cell table:style-name="a59" office:value-type="string">
            <text:p text:style-name="Td">Siparişiniz, o işi gerçekten yapabilecek atölyeye gider.</text:p>
          </table:table-cell>
        </table:table-row>
        <table:table-row>
          <table:table-cell table:style-name="a60" office:value-type="string">
            <text:p text:style-name="TdK">8. Kalite kontrol</text:p>
          </table:table-cell>
          <table:table-cell table:style-name="a60" office:value-type="string">
            <text:p text:style-name="Td">Üretici en az 1 ürün fotoğrafı yükleyip kalite kontrole gönderir. Figurunica onaylamadan kargoya verilemez; reddedilirse düzeltilip yeniden gönderilir.</text:p>
          </table:table-cell>
          <table:table-cell table:style-name="a60" office:value-type="string">
            <text:p text:style-name="Td">Figürünüz kargodan önce fotoğraflı kontrolden geçer.</text:p>
          </table:table-cell>
        </table:table-row>
        <table:table-row>
          <table:table-cell table:style-name="a59" office:value-type="string">
            <text:p text:style-name="TdK">9. El boyama (varsa)</text:p>
          </table:table-cell>
          <table:table-cell table:style-name="a59" office:value-type="string">
            <text:p text:style-name="Td">El Boyaması seçilen siparişlerde figür, kalite kontrolden sonra boyacı partnere devredilir; boyanır, <text:span text:style-name="B">ikinci</text:span> bir kalite kontrolden geçer.</text:p>
          </table:table-cell>
          <table:table-cell table:style-name="a59" office:value-type="string">
            <text:p text:style-name="Td">El boyama, ikinci kontrolden geçmeden yola çıkmaz.</text:p>
          </table:table-cell>
        </table:table-row>
        <table:table-row>
          <table:table-cell table:style-name="a60" office:value-type="string">
            <text:p text:style-name="TdK">10. Kargo</text:p>
          </table:table-cell>
          <table:table-cell table:style-name="a60" office:value-type="string">
            <text:p text:style-name="Td">Yurtiçi, Aras, MNG, PTT ve Sürat desteklenir; müşteriye tıklanabilir takip bağlantısı gösterilir, e-posta ve site içi bildirim gider.</text:p>
          </table:table-cell>
          <table:table-cell table:style-name="a60" office:value-type="string">
            <text:p text:style-name="Td">Türkiye içi kargo ücretsiz; takip numaranız elinizde.</text:p>
          </table:table-cell>
        </table:table-row>
        <table:table-row>
          <table:table-cell table:style-name="a59" office:value-type="string">
            <text:p text:style-name="TdK">11. Takip &amp; teslim</text:p>
          </table:table-cell>
          <table:table-cell table:style-name="a59" office:value-type="string">
            <text:p text:style-name="Td">/track/&lt;sipariş-no&gt; üyeliksiz açılır ve durum değiştiği anda kendiliğinden güncellenir (8 adımlı çizelge).</text:p>
          </table:table-cell>
          <table:table-cell table:style-name="a59" office:value-type="string">
            <text:p text:style-name="Td">Sipariş numaranızla, üye olmadan, canlı takip.</text:p>
          </table:table-cell>
        </table:table-row>
        <table:table-row>
          <table:table-cell table:style-name="a60" office:value-type="string">
            <text:p text:style-name="TdK">12. Sorun olursa</text:p>
          </table:table-cell>
          <table:table-cell table:style-name="a60" office:value-type="string">
            <text:p text:style-name="Td">Kargolanmış/teslim edilmiş siparişte “Sorun bildir”: benzemedi / hasarlı geldi / hiç ulaşmadı / diğer. Hasar, teslimattan sonraki <text:span text:style-name="B">48 saat</text:span> içinde fotoğrafla bildirilir.</text:p>
          </table:table-cell>
          <table:table-cell table:style-name="a60" office:value-type="string">
            <text:p text:style-name="Td">Kalite sorununda ücretsiz yeniden üretim, değişim veya bedel iadesi.</text:p>
          </table:table-cell>
        </table:table-row>
      </table:table>
      <text:h text:style-name="H1PB" text:outline-level="1">Neden Figurunica — satışta kullanılacak 8 argüman</text:h>
      <text:list text:style-name="UL">
        <text:list-item>
          <text:p text:style-name="ListBody"><text:span text:style-name="B">Baskıdan önce tasarımı müşteri onaylar.</text:span> AI iki seçenek üretir, müşteri seçer; 4 tura kadar yeni seçenek isteyebilir veya not bırakıp revizyon talep edebilir. Onaylamadan üretim başlamaz — “ne geleceğini bilmeden ödeme” riski yoktur.</text:p>
        </text:list-item>
        <text:list-item>
          <text:p text:style-name="ListBody"><text:span text:style-name="B">Zorunlu, fotoğraflı kalite kontrol.</text:span> Üretici baskıyı bitirince ürünün fotoğraflarını yüklemek zorundadır; Figurunica onaylamadan kargolama açılmaz. El boyamada ikinci bir tur daha vardır.</text:p>
        </text:list-item>
        <text:list-item>
          <text:p text:style-name="ListBody"><text:span text:style-name="B">Dağıtık üretim ağı + akıllı yönlendirme.</text:span> Sipariş; o malzemeyi basabilen, kapasitesi uygun ve mümkün olduğunca müşteriye yakın atölyeye gider. Atölye reddederse iş otomatik olarak sıradaki uygun atölyeye geçer.</text:p>
        </text:list-item>
        <text:list-item>
          <text:p text:style-name="ListBody"><text:span text:style-name="B">Türkiye içi kargo gerçekten ücretsiz.</text:span> Sipariş toplamına kargo bedeli eklenmez. “Hızlı kargo” (₺79) yalnızca süreyi kısaltan opsiyonel bir ektir.</text:p>
        </text:list-item>
        <text:list-item>
          <text:p text:style-name="ListBody"><text:span text:style-name="B">Üyelik zorunlu değil, takip herkese açık.</text:span> Misafir olarak sipariş verilip ödenebilir; takip sayfası giriş istemez ve durum değiştikçe canlı güncellenir.</text:p>
        </text:list-item>
        <text:list-item>
          <text:p text:style-name="ListBody"><text:span text:style-name="B">Fiyat şeffaflığı.</text:span> Tüm fiyatlar KDV dahildir ve ödemeden önce net gösterilir. Yüklenen 3D dosyalarda fiyat formülü bile açıktır (baz + cm³ başına birim fiyat).</text:p>
        </text:list-item>
        <text:list-item>
          <text:p text:style-name="ListBody"><text:span text:style-name="B">Havale/EFT ile %3 indirim + otomatik dekont okuma.</text:span> Dekont yüklenir, sistem okur; tutar ±1 TL toleransla eşleşir ve çoğu dekont insan beklemeden saniyeler içinde onaylanır.</text:p>
        </text:list-item>
        <text:list-item>
          <text:p text:style-name="ListBody"><text:span text:style-name="B">Ödeme güvenliği.</text:span> Kart bilgileri Figurunica sunucularına hiç girmez; ödeme PayTR’ın güvenli sayfasında yapılır ve ödeme bildirimi imzayla doğrulanır — sahte “ödeme başarılı” bildirimiyle sipariş açtırılamaz.</text:p>
        </text:list-item>
      </text:list>
      <text:h text:style-name="H1" text:outline-level="1">İtiraz karşılama</text:h>
      <text:p text:style-name="QaQ">Bana benzemezse ne olacak?</text:p>
      <text:p text:style-name="QaA">Baskı, siz tasarımı onaylamadan başlamaz. AI iki seçenek üretir; beğenmezseniz 4 tura kadar yeni seçenekler isteyebilirsiniz. Yine olmadıysa 1.000 karaktere kadar not bırakıp revizyon talebi gönderirsiniz, ekip inceleyip e-postayla döner.</text:p>
      <text:p text:style-name="QaQ">Kargo ücreti var mı?</text:p>
      <text:p text:style-name="QaA">Türkiye içi kargo tamamen ücretsiz; sipariş toplamına kargo bedeli eklenmez. Şu an yalnızca Türkiye içine gönderim yapıyoruz.</text:p>
      <text:p text:style-name="QaQ">Hangi fotoğraf işe yarar?</text:p>
      <text:p text:style-name="QaA">Net, iyi aydınlatılmış, yüzün göründüğü, sade arka planlı önden bir kare idealdir. JPG veya PNG, en fazla 10 MB. Gerçekçi ve 3D Obje desenlerinde ana fotoğrafın yanına 3 referans fotoğraf daha eklenebilir.</text:p>
      <text:p text:style-name="QaQ">Üye olmam gerekiyor mu?</text:p>
      <text:p text:style-name="QaA">Sipariş için hayır — misafir olarak ad-soyad ve e-posta ile sipariş verebilirsiniz; sonrasında e-postanıza hesap aktivasyon bağlantısı gelir. Yalnızca ücretsiz AI tasarım üretimi giriş ve e-posta doğrulaması ister.</text:p>
      <text:p text:style-name="QaQ">İade edebilir miyim?</text:p>
      <text:p text:style-name="QaA">Kişiye özel figürinler kişiselleştirilmiş ürün olduğu için 14 günlük cayma hakkı kapsamı dışındadır; fikir değişikliğiyle iade alınmaz. Hazır/standart mağaza ürünlerinde 14 gün cayma hakkı vardır. Hasar veya ayıp durumunda her iki üründe de ücretsiz yeniden üretim, değişim veya bedel iadesi yapılır; onaylanan iadeler 5–10 iş günü içinde ödeme yöntemine yansır.</text:p>
      <text:p text:style-name="QaQ">Boyamayı beceremem, zor mu?</text:p>
      <text:p text:style-name="QaA">Figür astarlanmış gelir, boya kolay tutunur ve kutuda adım adım rehber vardır. İstemezseniz El Boyaması (+₺1.000) veya Lüks Vitrin (+₺2.000) paketiyle profesyonel boyanmış olarak alırsınız.</text:p>
      <text:p text:style-name="QaQ">Mağazadaki ürün stokta var mı?</text:p>
      <text:p text:style-name="QaA">Stok kavramı yoktur — her ürün sipariş üzerine üretilir. Ürün sayfasındaki teslim süresi satıcının taahhüdüdür.</text:p>
      <text:p text:style-name="QaQ">Mağazadaki satıcı güvenilir mi?</text:p>
      <text:p text:style-name="QaA">Satıcılar kimlik/vergi kontrolünden geçmiş, hesabı aktif üreticilerdir; her ürün admin onayından geçer ve yayındaki ürün düzenlenirse yeniden incelemeye düşer. Askıya alınmış satıcının ürünleri satın alınamaz.</text:p>
      <text:p text:style-name="QaQ">Kendi dosyamı yüklersem fiyatı hemen görebilir miyim?</text:p>
      <text:p text:style-name="QaA">Uygun geometrideki modellerde fiyat hacimden otomatik hesaplanır. Ancak her yükleme için anında fiyat garanti edilemez: model kapalı hacim değilse, 220×220×250 mm baskı zarfına sığmıyorsa veya geometri ölçülemezse talep özel teklife düşer ve ekip fiyatı e-postayla iletir.</text:p>
      <text:p text:style-name="QaQ">Yüklediğim dosya başkasına gider mi?</text:p>
      <text:p text:style-name="QaA">Hayır. Baskı dosyalarını yalnızca siparişi atanan üretici, yetki kontrolünden geçen bir indirme ucundan çekebilir; mağaza ziyaretçilerine veya diğer müşterilere hiçbir zaman gösterilmez.</text:p>
      <text:p text:style-name="QaQ">Çok büyük bir parça bastırmak istiyorum.</text:p>
      <text:p text:style-name="QaA">220×220×250 mm zarfını aşan işler otomatik fiyatlanmaz ama reddedilmez; ekibimiz elle teklif hazırlar.</text:p>
      <text:p text:style-name="QaQ">50 adet aynı üründen alabilir miyim?</text:p>
      <text:p text:style-name="QaA">Sepette satır başına en fazla 20 adet alınabiliyor. Daha büyük hacimli talepler için WhatsApp veya e-posta üzerinden ekiple ilerlenmesi gerekir.</text:p>
      <text:h text:style-name="H1PB" text:outline-level="1">Sık sorulan sorular (sitedeki resmî cevaplar)</text:h>
      <text:p text:style-name="QaQ">Figürinim ne kadar sürede elime ulaşır?</text:p>
      <text:p text:style-name="QaA">Önizleme onayından sonra üretim genellikle 5–7 iş günü, Türkiye içi kargo 2–3 iş günü — toplam yaklaşık 7–10 iş günü. Bu süreler tahminidir, garanti edilmez.</text:p>
      <text:p text:style-name="QaQ">Figürinler ne kadar büyük?</text:p>
      <text:p text:style-name="QaA">Üç boyut: Küçük (~60 mm), Orta (~80 mm) ve Büyük (~120 mm). Orta boy en popüler tercihimizdir.</text:p>
      <text:p text:style-name="QaQ">Figürinler hangi malzemeden yapılıyor?</text:p>
      <text:p text:style-name="QaA">Reçine (profesyonel SLA baskı, yüksek kaliteli fotopolimer — dayanıklı, detaylı, pürüzsüz) veya filament (ekonomik FDM baskı). Seçim müşterinin.</text:p>
      <text:p text:style-name="QaQ">Baskıdan önce nasıl göreceğimi görebilir miyim?</text:p>
      <text:p text:style-name="QaA">Evet. Yapay zekâ fotoğrafınızdan iki stilize tasarım görseli üretir, siz birini seçersiniz. Beğenmezseniz 4 tura kadar yeni seçenekler üretebilir veya revizyon talebi gönderebilirsiniz. Siz onaylamadan baskı başlamaz. (Satın alma öncesi gösterilen bu görsel 2 boyutludur; 3D modeli sipariş sonrası ekibimiz hazırlar.)</text:p>
      <text:p text:style-name="QaQ">Nasıl ödeyebilirim?</text:p>
      <text:p text:style-name="QaA">Kredi/banka kartı (PayTR 3D Secure — kart bilgileriniz bize hiç girmez) veya Havale/EFT. Havale ile %3 indirim uygulanır, ödeme için 72 saatiniz vardır ve 24. saatte hatırlatma e-postası gider. Hediye kartı bakiyesi siparişi tamamen karşılarsa ödeme adımı atlanır.</text:p>
      <text:p text:style-name="QaQ">Siparişimi nasıl takip ederim?</text:p>
      <text:p text:style-name="QaA">figurunica.com/track/&lt;sipariş-numaranız&gt; adresinden — üye olmanıza gerek yok. Sayfa, sipariş durumu değiştiği anda kendiliğinden güncellenir.</text:p>
      <text:p text:style-name="QaQ">STL/OBJ dosyalarımı alabilir miyim?</text:p>
      <text:p text:style-name="QaA">Evet — ödeme adımında “Dijital dosyalar” ek hizmetini (₺99) seçtiyseniz, ekibimiz modelinizi hazırladıktan sonra sipariş sayfanızdan indirebilirsiniz.</text:p>
      <text:p text:style-name="QaQ">Ürün hasarlı gelirse?</text:p>
      <text:p text:style-name="QaA">Teslimattan sonra 48 saat içinde fotoğraflarla info@figurunica.com adresine bildirin; hasar doğrulandığında ürün ücretsiz yeniden üretilir, değiştirilir veya bedeli iade edilir.</text:p>
      <text:h text:style-name="H1PB" text:outline-level="1">Asla söylemeyin</text:h>
      <table:table table:name="Ca61" table:style-name="a61">
        <table:table-column table:style-name="a62"/>
        <table:table-row>
          <table:table-cell table:style-name="a63" office:value-type="string">
            <text:p text:style-name="a64">Bu ifadeler yanlıştır ve müşteriyi yanıltır</text:p>
            <text:p text:style-name="CoBody">Aşağıdaki cümleler ürünün gerçekte yaptığı işle çelişir. Reklamda, sosyal medyada, e-postada veya birebir görüşmede kullanılmamalıdır. Her maddenin altında doğru mesaj vardır.</text:p>
          </table:table-cell>
        </table:table-row>
      </table:table>
      <text:list text:style-name="UL">
        <text:list-item>
          <text:p text:style-name="ListBody"><text:span text:style-name="B">“Yapay zekâ fotoğrafınızı anında 3D modele çevirir.”</text:span> — Otomatik 3D üretimi yoktur. AI yalnızca 2 boyutlu stilize görsel üretir; 3D modeli ödeme sonrası ekip hazırlar. *Doğru mesaj:* “Baskıdan önce tasarımınızı onaylayın.”</text:p>
        </text:list-item>
        <text:list-item>
          <text:p text:style-name="ListBody"><text:span text:style-name="B">“Satın almadan önce 3D modelini döndürerek inceleyin.”</text:span> — Satın alma öncesi önizleme düz bir 2D görseldir; döndürülebilir 3D önizleme yoktur. Bu, mağaza ürünleri için de geçerlidir.</text:p>
        </text:list-item>
        <text:list-item>
          <text:p text:style-name="ListBody"><text:span text:style-name="B">“Koşulsuz para iade garantisi” / “Memnun kalmazsan iade.”</text:span> — Kişiye özel figürinlerde fikir değişikliğiyle iade yoktur. *Doğru mesaj:* onaylamadan baskı başlamaz + hasar/ayıpta ücretsiz yenileme, değişim veya bedel iadesi + hazır ürünlerde 14 gün cayma hakkı.</text:p>
        </text:list-item>
        <text:list-item>
          <text:p text:style-name="ListBody"><text:span text:style-name="B">“Tek tıkla anında para iadesi.”</text:span> — Para iadesi manuel bir operasyondur; “5–10 iş günü” operasyonel taahhüttür, yazılım garantisi değildir.</text:p>
        </text:list-item>
        <text:list-item>
          <text:p text:style-name="ListBody"><text:span text:style-name="B">“Dekontunuz anında onaylanır.”</text:span> — Koşulsuz söylemeyin. Bulanık/eğik dekont veya IBAN uyuşmazlığında sipariş insan incelemesine düşer. *Doğru mesaj:* “çoğu dekont saniyeler içinde otomatik onaylanır.”</text:p>
        </text:list-item>
        <text:list-item>
          <text:p text:style-name="ListBody"><text:span text:style-name="B">“E-faturanız otomatik düzenlenir.”</text:span> — E-fatura entegrasyonu yoktur; yalnızca uygulama içinde KDV ayrıştırmalı fatura dökümü gösterilir.</text:p>
        </text:list-item>
        <text:list-item>
          <text:p text:style-name="ListBody"><text:span text:style-name="B">“Kargonuzu canlı izliyoruz, teslimatta otomatik haber veriyoruz.”</text:span> — “Teslim edildi” bilgisi kargo firmasından otomatik gelmez, ekip elle işaretler.</text:p>
        </text:list-item>
        <text:list-item>
          <text:p text:style-name="ListBody"><text:span text:style-name="B">“Kampanya kodu / indirim kuponu girin.”</text:span> — Kupon, promosyon kodu, toplu alım indirimi ve referans programı sistemde YOKTUR. Tek indirimler: %3 havale indirimi ve hediye kartı.</text:p>
        </text:list-item>
        <text:list-item>
          <text:p text:style-name="ListBody"><text:span text:style-name="B">“Sevdiklerinize hediye kartı satın alın.”</text:span> — Müşteri siteden hediye kartı SATIN ALAMAZ; kartlar yalnızca yönetici panelinden oluşturulur.</text:p>
        </text:list-item>
        <text:list-item>
          <text:p text:style-name="ListBody"><text:span text:style-name="B">“5.000+ mutlu müşteri”, “4,9 puan”, “binlerce hazır ürün”</text:span> gibi hacim/sosyal kanıt iddiaları YASAKTIR — sitede müşteri yorumu/referans bölümü yoktur ve elimizde doğrulanmış bir sayı yoktur.</text:p>
        </text:list-item>
        <text:list-item>
          <text:p text:style-name="ListBody"><text:span text:style-name="B">“Dünyaya gönderim.”</text:span> — Şu an yalnızca Türkiye içi teslimat vardır.</text:p>
        </text:list-item>
        <text:list-item>
          <text:p text:style-name="ListBody"><text:span text:style-name="B">“Yüklediğiniz her modele anında otomatik fiyat.”</text:span> — Geometri işlenemezse, model kapalı hacim değilse veya baskı zarfını aşarsa talep özel teklife düşer.</text:p>
        </text:list-item>
        <text:list-item>
          <text:p text:style-name="ListBody"><text:span text:style-name="B">“Görsellerinizi kendi sunucumuzda üretiyoruz.”</text:span> — Figür görselleri dış bir servisle üretilir (sağlayıcı adı dışarıya verilmez). Kendi sunucumuzda yapılan tek AI işi arka plan silmedir.</text:p>
        </text:list-item>
        <text:list-item>
          <text:p text:style-name="ListBody"><text:span text:style-name="B">“Telefon/SMS doğrulamalı güvenli üretim.”</text:span> — Telefon doğrulaması kapalıdır.</text:p>
        </text:list-item>
        <text:list-item>
          <text:p text:style-name="ListBody"><text:span text:style-name="B">“Fotoğraflarınız 90 gün sonra otomatik silinir.”</text:span> — Bu uygulanmıyor; siparişe bağlı fotoğraflar saklanır.</text:p>
        </text:list-item>
        <text:list-item>
          <text:p text:style-name="ListBody"><text:span text:style-name="B">“Tek tıkla siparişi iptal et.”</text:span> — Müşteri tarafında iptal butonu yoktur; iptal e-posta ile manuel yapılır.</text:p>
        </text:list-item>
        <text:list-item>
          <text:p text:style-name="ListBody"><text:span text:style-name="B">Teslim sürelerini “garanti” diye sunmayın</text:span> — politika açıkça “tahminidir, garanti edilmez” der.</text:p>
        </text:list-item>
        <text:list-item>
          <text:p text:style-name="ListBody"><text:span text:style-name="B">Başlangıç fiyatında tek rakama sadık kalın:</text:span> reçine ₺999’dan, filament ₺899’dan başlar. İki farklı rakamı aynı kampanyada karıştırmayın.</text:p>
        </text:list-item>
        <text:list-item>
          <text:p text:style-name="ListBody"><text:span text:style-name="B">İngilizce pazarlama materyalini sitedeki metinlere dayandırmayın</text:span> — site yalnızca Türkçe yayındadır.</text:p>
        </text:list-item>
      </text:list>
      <text:h text:style-name="H1" text:outline-level="1">Kampanya öncesi netleştirilecekler</text:h>
      <text:p text:style-name="Body">Aşağıdaki maddeler kampanya yayına girmeden önce kurucuya/ekibe sorulmalıdır. Cevap alınmadan ilgili konuda iletişim yapılmamalıdır.</text:p>
      <text:list text:style-name="OL">
        <text:list-item>
          <text:p text:style-name="ListBody">Başlangıç fiyatı iletişiminde hangi rakamı kullanıyoruz: “₺899’dan başlayan” (filament) mı, “₺999’dan başlayan” (reçine) mi?</text:p>
        </text:list-item>
        <text:list-item>
          <text:p text:style-name="ListBody">Kargo SMS’i gerçekten gönderiliyor mu? (SMS sağlayıcısının bağlı olduğu teyit edilmeli.)</text:p>
        </text:list-item>
        <text:list-item>
          <text:p text:style-name="ListBody">İade politikası ile sitedeki bazı güven ifadeleri çelişiyor. Hukuk hangi metni onaylıyor?</text:p>
        </text:list-item>
        <text:list-item>
          <text:p text:style-name="ListBody">Gizlilik politikasında kodla çelişen maddeler var. Düzeltilecek mi, yoksa pazarlama bu konulardan hiç bahsetmeyecek mi?</text:p>
        </text:list-item>
        <text:list-item>
          <text:p text:style-name="ListBody">Yurt dışı gönderim talebi geldiğinde standart cevabımız ne?</text:p>
        </text:list-item>
        <text:list-item>
          <text:p text:style-name="ListBody">Kupon/indirim kodu motoru gelecek mi? Gelmezse tüm kampanyalar %3 havale indirimi ve hediye kartı üzerinden kurgulanmalı.</text:p>
        </text:list-item>
        <text:list-item>
          <text:p text:style-name="ListBody">Hediye kartı satın alma sayfası yol haritasında var mı? Yılbaşı/bayram kampanyası bunsuz kurulamaz.</text:p>
        </text:list-item>
        <text:list-item>
          <text:p text:style-name="ListBody">Mağazada onaylı ürün var mı? Yoksa ana sayfa rafları boş görünür.</text:p>
        </text:list-item>
      </text:list>
      <text:h text:style-name="H1" text:outline-level="1">İletişim</text:h>
      <table:table table:name="Ta65" table:style-name="a65">
        <table:table-column table:style-name="a66"/>
        <table:table-column table:style-name="a67"/>
        <table:table-row>
          <table:table-cell table:style-name="a69" office:value-type="string">
            <text:p text:style-name="TdK">Web</text:p>
          </table:table-cell>
          <table:table-cell table:style-name="a69" office:value-type="string">
            <text:p text:style-name="Td">figurunica.com</text:p>
          </table:table-cell>
        </table:table-row>
        <table:table-row>
          <table:table-cell table:style-name="a70" office:value-type="string">
            <text:p text:style-name="TdK">E-posta</text:p>
          </table:table-cell>
          <table:table-cell table:style-name="a70" office:value-type="string">
            <text:p text:style-name="Td">info@figurunica.com</text:p>
          </table:table-cell>
        </table:table-row>
        <table:table-row>
          <table:table-cell table:style-name="a69" office:value-type="string">
            <text:p text:style-name="TdK">Telefon / WhatsApp</text:p>
          </table:table-cell>
          <table:table-cell table:style-name="a69" office:value-type="string">
            <text:p text:style-name="Td">+90 850 840 73 03</text:p>
          </table:table-cell>
        </table:table-row>
        <table:table-row>
          <table:table-cell table:style-name="a70" office:value-type="string">
            <text:p text:style-name="TdK">Stüdyo</text:p>
          </table:table-cell>
          <table:table-cell table:style-name="a70" office:value-type="string">
            <text:p text:style-name="Td">Şehit Osman Avcı Mah., Akın 688 Sitesi B32, Etimesgut / Ankara</text:p>
          </table:table-cell>
        </table:table-row>
        <table:table-row>
          <table:table-cell table:style-name="a69" office:value-type="string">
            <text:p text:style-name="TdK">Sipariş takibi</text:p>
          </table:table-cell>
          <table:table-cell table:style-name="a69" office:value-type="string">
            <text:p text:style-name="Td">figurunica.com/track/&lt;sipariş-numarası&gt; — üyelik gerekmez</text:p>
          </table:table-cell>
        </table:table-row>
      </table:table>
      <text:p text:style-name="Note">Bu doküman canlı koddan doğrulanmış bilgilerle üretilmiştir (sürüm v1.0 · 13 Temmuz 2026). Fiyat veya politika değiştiğinde pazarlama ekibi güncel sürümü talep etmelid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svg="urn:oasis:names:tc:opendocument:xmlns:svg-compatible:1.0" xmlns:meta="urn:oasis:names:tc:opendocument:xmlns:meta:1.0" xmlns:dc="http://purl.org/dc/elements/1.1/" office:version="1.3">
  <office:font-face-decls>
    <style:font-face style:name="Liberation Sans" svg:font-family="'Liberation Sans', Arial, sans-serif" style:font-family-generic="swiss" style:font-pitch="variable"/>
  </office:font-face-decls>
  <office:styles>
    <style:default-style style:family="paragraph">
      <style:paragraph-properties fo:hyphenate="false" style:line-height-at-least="0.42cm"/>
      <style:text-properties style:font-name="Liberation Sans" fo:font-size="10.5pt" fo:color="#0B0C0F" fo:language="tr" fo:country="TR"/>
    </style:default-style>
    <style:style style:name="Standard" style:family="paragraph">
      <style:paragraph-properties fo:margin-bottom="0.26cm" fo:line-height="138%"/>
      <style:text-properties style:font-name="Liberation Sans" fo:font-size="10.5pt" fo:color="#0B0C0F"/>
    </style:style>
    <style:style style:name="Body" style:family="paragraph" style:parent-style-name="Standard">
      <style:paragraph-properties fo:margin-bottom="0.26cm" fo:line-height="138%" fo:text-align="justify"/>
    </style:style>
    <style:style style:name="Lead" style:family="paragraph" style:parent-style-name="Standard">
      <style:paragraph-properties fo:margin-bottom="0.36cm" fo:line-height="146%"/>
      <style:text-properties fo:font-size="11.5pt" fo:color="#44464E"/>
    </style:style>
    <style:style style:name="Note" style:family="paragraph" style:parent-style-name="Standard">
      <style:paragraph-properties fo:margin-top="0.1cm" fo:margin-bottom="0.3cm"/>
      <style:text-properties fo:font-size="9.5pt" fo:font-style="italic" fo:color="#8A8C93"/>
    </style:style>
    <style:style style:name="H1" style:family="paragraph" style:parent-style-name="Standard">
      <style:paragraph-properties fo:margin-top="0.75cm" fo:margin-bottom="0.3cm" fo:keep-with-next="always" fo:padding-bottom="0.12cm" fo:border-bottom="1.5pt solid #00D4FF" fo:border-top="none" fo:border-left="none" fo:border-right="none"/>
      <style:text-properties fo:font-size="16.5pt" fo:font-weight="bold" fo:color="#0B3D4C"/>
    </style:style>
    <style:style style:name="H1PB" style:family="paragraph" style:parent-style-name="H1">
      <style:paragraph-properties fo:margin-top="0.75cm" fo:margin-bottom="0.3cm" fo:keep-with-next="always" fo:padding-bottom="0.12cm" fo:border-bottom="1.5pt solid #00D4FF" fo:border-top="none" fo:border-left="none" fo:border-right="none" fo:break-before="page"/>
    </style:style>
    <style:style style:name="H2" style:family="paragraph" style:parent-style-name="Standard">
      <style:paragraph-properties fo:margin-top="0.5cm" fo:margin-bottom="0.18cm" fo:keep-with-next="always"/>
      <style:text-properties fo:font-size="12pt" fo:font-weight="bold" fo:color="#0E7490"/>
    </style:style>
    <style:style style:name="ListBody" style:family="paragraph" style:parent-style-name="Standard">
      <style:paragraph-properties fo:margin-bottom="0.16cm" fo:line-height="136%"/>
    </style:style>
    <style:style style:name="Quote" style:family="paragraph" style:parent-style-name="Standard">
      <style:paragraph-properties fo:margin-left="0.5cm" fo:margin-right="0.3cm" fo:margin-top="0.25cm" fo:margin-bottom="0.35cm" fo:padding="0.32cm" fo:background-color="#F5F9FB" fo:border-left="3pt solid #0891B2" fo:border-top="none" fo:border-bottom="none" fo:border-right="none" fo:line-height="150%"/>
      <style:text-properties fo:font-size="11.5pt" fo:font-style="italic" fo:color="#0B3D4C"/>
    </style:style>
    <style:style style:name="QaQ" style:family="paragraph" style:parent-style-name="Standard">
      <style:paragraph-properties fo:margin-top="0.28cm" fo:margin-bottom="0.08cm" fo:keep-with-next="always"/>
      <style:text-properties fo:font-size="10.5pt" fo:font-weight="bold" fo:color="#0B3D4C"/>
    </style:style>
    <style:style style:name="QaA" style:family="paragraph" style:parent-style-name="Standard">
      <style:paragraph-properties fo:margin-left="0.35cm" fo:margin-bottom="0.1cm" fo:line-height="138%"/>
    </style:style>
    <style:style style:name="Th" style:family="paragraph" style:parent-style-name="Standard">
      <style:paragraph-properties fo:margin-bottom="0cm"/>
      <style:text-properties fo:font-size="9.5pt" fo:font-weight="bold" fo:color="#FFFFFF"/>
    </style:style>
    <style:style style:name="Td" style:family="paragraph" style:parent-style-name="Standard">
      <style:paragraph-properties fo:margin-bottom="0cm" fo:line-height="130%"/>
      <style:text-properties fo:font-size="9.5pt"/>
    </style:style>
    <style:style style:name="TdK" style:family="paragraph" style:parent-style-name="Standard">
      <style:paragraph-properties fo:margin-bottom="0cm" fo:line-height="130%"/>
      <style:text-properties fo:font-size="9.5pt" fo:font-weight="bold" fo:color="#0B3D4C"/>
    </style:style>
    <style:style style:name="CoTitle" style:family="paragraph" style:parent-style-name="Standard">
      <style:paragraph-properties fo:margin-bottom="0.12cm"/>
      <style:text-properties fo:font-size="10.5pt" fo:font-weight="bold"/>
    </style:style>
    <style:style style:name="CoBody" style:family="paragraph" style:parent-style-name="Standard">
      <style:paragraph-properties fo:margin-bottom="0.1cm" fo:line-height="136%"/>
      <style:text-properties fo:font-size="10pt"/>
    </style:style>
    <style:style style:name="CvLabel" style:family="paragraph" style:parent-style-name="Standard">
      <style:paragraph-properties fo:margin-bottom="0.15cm"/>
      <style:text-properties fo:font-size="9pt" fo:font-weight="bold" fo:color="#00D4FF" fo:letter-spacing="0.06cm"/>
    </style:style>
    <style:style style:name="CvNum" style:family="paragraph" style:parent-style-name="Standard">
      <style:paragraph-properties fo:margin-bottom="0.1cm"/>
      <style:text-properties fo:font-size="40pt" fo:font-weight="bold" fo:color="#00D4FF"/>
    </style:style>
    <style:style style:name="CvTitle" style:family="paragraph" style:parent-style-name="Standard">
      <style:paragraph-properties fo:margin-bottom="0.25cm"/>
      <style:text-properties fo:font-size="30pt" fo:font-weight="bold" fo:color="#FFFFFF"/>
    </style:style>
    <style:style style:name="CvSub" style:family="paragraph" style:parent-style-name="Standard">
      <style:paragraph-properties fo:margin-bottom="0.3cm" fo:line-height="140%"/>
      <style:text-properties fo:font-size="11.5pt" fo:color="#CDF6FD"/>
    </style:style>
    <style:style style:name="CvAud" style:family="paragraph" style:parent-style-name="Standard">
      <style:paragraph-properties fo:margin-bottom="0cm"/>
      <style:text-properties fo:font-size="10pt" fo:font-weight="bold" fo:color="#00D4FF"/>
    </style:style>
    <style:style style:name="CvImg" style:family="paragraph" style:parent-style-name="Standard">
      <style:paragraph-properties fo:text-align="center" fo:margin-top="0.6cm" fo:margin-bottom="0.4cm"/>
    </style:style>
    <style:style style:name="TocItem" style:family="paragraph" style:parent-style-name="Standard">
      <style:paragraph-properties fo:margin-bottom="0.12cm" fo:margin-left="0.3cm"/>
      <style:text-properties fo:font-size="10.5pt"/>
    </style:style>
    <style:style style:name="Footer" style:family="paragraph" style:parent-style-name="Standard">
      <style:paragraph-properties fo:margin-bottom="0cm" fo:text-align="center"/>
      <style:text-properties fo:font-size="8.5pt" fo:color="#8A8C93"/>
    </style:style>
    <style:style style:name="B" style:family="text">
      <style:text-properties fo:font-weight="bold" fo:color="#0B3D4C"/>
    </style:style>
    <style:style style:name="BW" style:family="text">
      <style:text-properties fo:font-weight="bold" fo:color="#FFFFFF"/>
    </style:style>
    <text:list-style style:name="UL">
      <text:list-level-style-bullet text:level="1" text:bullet-char="•">
        <style:list-level-properties text:space-before="0.35cm" text:min-label-width="0.42cm"/>
        <style:text-properties style:font-name="Liberation Sans" fo:color="#0891B2"/>
      </text:list-level-style-bullet>
      <text:list-level-style-bullet text:level="2" text:bullet-char="–">
        <style:list-level-properties text:space-before="0.85cm" text:min-label-width="0.42cm"/>
        <style:text-properties style:font-name="Liberation Sans" fo:color="#0891B2"/>
      </text:list-level-style-bullet>
    </text:list-style>
    <text:list-style style:name="OL">
      <text:list-level-style-number text:level="1" style:num-suffix="." style:num-format="1">
        <style:list-level-properties text:space-before="0.35cm" text:min-label-width="0.55cm"/>
        <style:text-properties style:font-name="Liberation Sans" fo:font-weight="bold" fo:color="#0891B2"/>
      </text:list-level-style-number>
    </text:list-style>
  </office:styles>
  <office:automatic-styles>
    <style:page-layout style:name="PL">
      <style:page-layout-properties fo:page-width="21cm" fo:page-height="29.7cm" style:print-orientation="portrait" fo:margin-top="1.9cm" fo:margin-bottom="1.7cm" fo:margin-left="2.1cm" fo:margin-right="2.1cm"/>
      <style:footer-style>
        <style:header-footer-properties fo:min-height="0.7cm" fo:margin-top="0.5cm"/>
      </style:footer-style>
    </style:page-layout>
  </office:automatic-styles>
  <office:master-styles>
    <style:master-page style:name="Standard" style:page-layout-name="PL">
      <style:footer>
        <text:p text:style-name="Footer">Figurunica · Pazarlama Kiti · v1.0 · 13 Temmuz 2026 · <text:page-number text:select-page="current">1</text:page-number></text:p>
      </style:footer>
    </style:master-page>
  </office:master-styles>
</office:document-styles>
</file>

<file path=meta.xml><?xml version="1.0" encoding="utf-8"?>
<office:document-meta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svg="urn:oasis:names:tc:opendocument:xmlns:svg-compatible:1.0" xmlns:meta="urn:oasis:names:tc:opendocument:xmlns:meta:1.0" xmlns:dc="http://purl.org/dc/elements/1.1/" office:version="1.3">
  <office:meta>
    <dc:title>Figurunica — Son Müşteri Satış Kiti</dc:title>
    <dc:subject>Hedef kitle: bireysel müşteri · hediye alıcısı · mağaza müşterisi · maker</dc:subject>
    <dc:language>tr-TR</dc:language>
    <meta:keyword>Figurunica</meta:keyword>
    <meta:keyword>pazarlama</meta:keyword>
  </office:meta>
</office:document-meta>
</file>