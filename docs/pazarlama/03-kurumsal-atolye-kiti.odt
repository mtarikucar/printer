
<file path=META-INF/manifest.xml><?xml version="1.0" encoding="utf-8"?>
<manifest:manifest xmlns:manifest="urn:oasis:names:tc:opendocument:xmlns:manifest:1.0" manifest:version="1.3">
  <manifest:file-entry manifest:full-path="/" manifest:version="1.3" manifest:media-type="application/vnd.oasis.opendocument.text"/>
  <manifest:file-entry manifest:full-path="content.xml" manifest:media-type="text/xml"/>
  <manifest:file-entry manifest:full-path="styles.xml" manifest:media-type="text/xml"/>
  <manifest:file-entry manifest:full-path="meta.xml" manifest:media-type="text/xml"/>
  <manifest:file-entry manifest:full-path="Pictures/maskot.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svg="urn:oasis:names:tc:opendocument:xmlns:svg-compatible:1.0" xmlns:meta="urn:oasis:names:tc:opendocument:xmlns:meta:1.0" xmlns:dc="http://purl.org/dc/elements/1.1/" office:version="1.3">
  <office:font-face-decls>
    <style:font-face style:name="Liberation Sans" svg:font-family="'Liberation Sans', Arial, sans-serif" style:font-family-generic="swiss" style:font-pitch="variable"/>
  </office:font-face-decls>
  <office:automatic-styles>
    <style:style style:name="a1" style:family="table">
      <style:table-properties style:width="16.8cm" table:align="left" fo:margin-bottom="0.6cm"/>
    </style:style>
    <style:style style:name="a2" style:family="table-column">
      <style:table-column-properties style:column-width="16.8cm"/>
    </style:style>
    <style:style style:name="a3" style:family="table-cell">
      <style:table-cell-properties fo:background-color="#0B0C0F" fo:padding-top="1.1cm" fo:padding-bottom="1.1cm" fo:padding-left="0.9cm" fo:padding-right="0.9cm" fo:border="none"/>
    </style:style>
    <style:style style:name="a4" style:family="table">
      <style:table-properties style:width="16.0cm" table:align="left" fo:margin-top="0.15cm" fo:margin-bottom="0.4cm"/>
    </style:style>
    <style:style style:name="a5" style:family="table-column">
      <style:table-column-properties style:column-width="4.6cm"/>
    </style:style>
    <style:style style:name="a6" style:family="table-column">
      <style:table-column-properties style:column-width="11.4cm"/>
    </style:style>
    <style:style style:name="a7" style:family="table-cell">
      <style:table-cell-properties fo:background-color="#0B3D4C" fo:padding-top="0.14cm" fo:padding-bottom="0.14cm" fo:padding-left="0.2cm" fo:padding-right="0.2cm" fo:border-top="none" fo:border-right="none" fo:border-bottom="0.5pt solid #E3E7EA" fo:border-left="none" style:vertical-align="top"/>
    </style:style>
    <style:style style:name="a8" style:family="table-cell">
      <style:table-cell-properties fo:background-color="#FFFFFF" fo:padding-top="0.14cm" fo:padding-bottom="0.14cm" fo:padding-left="0.2cm" fo:padding-right="0.2cm" fo:border-top="none" fo:border-right="none" fo:border-bottom="0.5pt solid #E3E7EA" fo:border-left="none" style:vertical-align="top"/>
    </style:style>
    <style:style style:name="a9" style:family="table-cell">
      <style:table-cell-properties fo:background-color="#F5F9FB" fo:padding-top="0.14cm" fo:padding-bottom="0.14cm" fo:padding-left="0.2cm" fo:padding-right="0.2cm" fo:border-top="none" fo:border-right="none" fo:border-bottom="0.5pt solid #E3E7EA" fo:border-left="none" style:vertical-align="top"/>
    </style:style>
    <style:style style:name="a10" style:family="table">
      <style:table-properties style:width="16cm" table:align="left" fo:margin-top="0.25cm" fo:margin-bottom="0.4cm"/>
    </style:style>
    <style:style style:name="a11" style:family="table-column">
      <style:table-column-properties style:column-width="16cm"/>
    </style:style>
    <style:style style:name="a12" style:family="table-cell">
      <style:table-cell-properties fo:background-color="#FFFBEB" fo:padding="0.32cm" fo:border="none" fo:border-left="3pt solid #F59E0B"/>
    </style:style>
    <style:style style:name="a13" style:family="paragraph" style:parent-style-name="CoTitle">
      <style:text-properties fo:color="#92400E"/>
    </style:style>
    <style:style style:name="a14" style:family="table">
      <style:table-properties style:width="16.0cm" table:align="left" fo:margin-top="0.15cm" fo:margin-bottom="0.4cm"/>
    </style:style>
    <style:style style:name="a15" style:family="table-column">
      <style:table-column-properties style:column-width="4.4cm"/>
    </style:style>
    <style:style style:name="a16" style:family="table-column">
      <style:table-column-properties style:column-width="6.6cm"/>
    </style:style>
    <style:style style:name="a17" style:family="table-column">
      <style:table-column-properties style:column-width="5.0cm"/>
    </style:style>
    <style:style style:name="a18" style:family="table-cell">
      <style:table-cell-properties fo:background-color="#0B3D4C" fo:padding-top="0.14cm" fo:padding-bottom="0.14cm" fo:padding-left="0.2cm" fo:padding-right="0.2cm" fo:border-top="none" fo:border-right="none" fo:border-bottom="0.5pt solid #E3E7EA" fo:border-left="none" style:vertical-align="top"/>
    </style:style>
    <style:style style:name="a19" style:family="table-cell">
      <style:table-cell-properties fo:background-color="#FFFFFF" fo:padding-top="0.14cm" fo:padding-bottom="0.14cm" fo:padding-left="0.2cm" fo:padding-right="0.2cm" fo:border-top="none" fo:border-right="none" fo:border-bottom="0.5pt solid #E3E7EA" fo:border-left="none" style:vertical-align="top"/>
    </style:style>
    <style:style style:name="a20" style:family="table-cell">
      <style:table-cell-properties fo:background-color="#F5F9FB" fo:padding-top="0.14cm" fo:padding-bottom="0.14cm" fo:padding-left="0.2cm" fo:padding-right="0.2cm" fo:border-top="none" fo:border-right="none" fo:border-bottom="0.5pt solid #E3E7EA" fo:border-left="none" style:vertical-align="top"/>
    </style:style>
    <style:style style:name="a21" style:family="table">
      <style:table-properties style:width="16.0cm" table:align="left" fo:margin-top="0.15cm" fo:margin-bottom="0.4cm"/>
    </style:style>
    <style:style style:name="a22" style:family="table-column">
      <style:table-column-properties style:column-width="4.2cm"/>
    </style:style>
    <style:style style:name="a23" style:family="table-column">
      <style:table-column-properties style:column-width="11.8cm"/>
    </style:style>
    <style:style style:name="a24" style:family="table-cell">
      <style:table-cell-properties fo:background-color="#0B3D4C" fo:padding-top="0.14cm" fo:padding-bottom="0.14cm" fo:padding-left="0.2cm" fo:padding-right="0.2cm" fo:border-top="none" fo:border-right="none" fo:border-bottom="0.5pt solid #E3E7EA" fo:border-left="none" style:vertical-align="top"/>
    </style:style>
    <style:style style:name="a25" style:family="table-cell">
      <style:table-cell-properties fo:background-color="#FFFFFF" fo:padding-top="0.14cm" fo:padding-bottom="0.14cm" fo:padding-left="0.2cm" fo:padding-right="0.2cm" fo:border-top="none" fo:border-right="none" fo:border-bottom="0.5pt solid #E3E7EA" fo:border-left="none" style:vertical-align="top"/>
    </style:style>
    <style:style style:name="a26" style:family="table-cell">
      <style:table-cell-properties fo:background-color="#F5F9FB" fo:padding-top="0.14cm" fo:padding-bottom="0.14cm" fo:padding-left="0.2cm" fo:padding-right="0.2cm" fo:border-top="none" fo:border-right="none" fo:border-bottom="0.5pt solid #E3E7EA" fo:border-left="none" style:vertical-align="top"/>
    </style:style>
    <style:style style:name="a27" style:family="table">
      <style:table-properties style:width="16cm" table:align="left" fo:margin-top="0.25cm" fo:margin-bottom="0.4cm"/>
    </style:style>
    <style:style style:name="a28" style:family="table-column">
      <style:table-column-properties style:column-width="16cm"/>
    </style:style>
    <style:style style:name="a29" style:family="table-cell">
      <style:table-cell-properties fo:background-color="#ECFEFF" fo:padding="0.32cm" fo:border="none" fo:border-left="3pt solid #0891B2"/>
    </style:style>
    <style:style style:name="a30" style:family="paragraph" style:parent-style-name="CoTitle">
      <style:text-properties fo:color="#0B3D4C"/>
    </style:style>
    <style:style style:name="a31" style:family="table">
      <style:table-properties style:width="16.0cm" table:align="left" fo:margin-top="0.15cm" fo:margin-bottom="0.4cm"/>
    </style:style>
    <style:style style:name="a32" style:family="table-column">
      <style:table-column-properties style:column-width="4.6cm"/>
    </style:style>
    <style:style style:name="a33" style:family="table-column">
      <style:table-column-properties style:column-width="3.4cm"/>
    </style:style>
    <style:style style:name="a34" style:family="table-column">
      <style:table-column-properties style:column-width="8.0cm"/>
    </style:style>
    <style:style style:name="a35" style:family="table-cell">
      <style:table-cell-properties fo:background-color="#0B3D4C" fo:padding-top="0.14cm" fo:padding-bottom="0.14cm" fo:padding-left="0.2cm" fo:padding-right="0.2cm" fo:border-top="none" fo:border-right="none" fo:border-bottom="0.5pt solid #E3E7EA" fo:border-left="none" style:vertical-align="top"/>
    </style:style>
    <style:style style:name="a36" style:family="table-cell">
      <style:table-cell-properties fo:background-color="#FFFFFF" fo:padding-top="0.14cm" fo:padding-bottom="0.14cm" fo:padding-left="0.2cm" fo:padding-right="0.2cm" fo:border-top="none" fo:border-right="none" fo:border-bottom="0.5pt solid #E3E7EA" fo:border-left="none" style:vertical-align="top"/>
    </style:style>
    <style:style style:name="a37" style:family="table-cell">
      <style:table-cell-properties fo:background-color="#F5F9FB" fo:padding-top="0.14cm" fo:padding-bottom="0.14cm" fo:padding-left="0.2cm" fo:padding-right="0.2cm" fo:border-top="none" fo:border-right="none" fo:border-bottom="0.5pt solid #E3E7EA" fo:border-left="none" style:vertical-align="top"/>
    </style:style>
    <style:style style:name="a38" style:family="table">
      <style:table-properties style:width="16cm" table:align="left" fo:margin-top="0.25cm" fo:margin-bottom="0.4cm"/>
    </style:style>
    <style:style style:name="a39" style:family="table-column">
      <style:table-column-properties style:column-width="16cm"/>
    </style:style>
    <style:style style:name="a40" style:family="table-cell">
      <style:table-cell-properties fo:background-color="#FFFBEB" fo:padding="0.32cm" fo:border="none" fo:border-left="3pt solid #F59E0B"/>
    </style:style>
    <style:style style:name="a41" style:family="paragraph" style:parent-style-name="CoTitle">
      <style:text-properties fo:color="#92400E"/>
    </style:style>
    <style:style style:name="a42" style:family="table">
      <style:table-properties style:width="16.0cm" table:align="left" fo:margin-top="0.15cm" fo:margin-bottom="0.4cm"/>
    </style:style>
    <style:style style:name="a43" style:family="table-column">
      <style:table-column-properties style:column-width="4.6cm"/>
    </style:style>
    <style:style style:name="a44" style:family="table-column">
      <style:table-column-properties style:column-width="11.4cm"/>
    </style:style>
    <style:style style:name="a45" style:family="table-cell">
      <style:table-cell-properties fo:background-color="#0B3D4C" fo:padding-top="0.14cm" fo:padding-bottom="0.14cm" fo:padding-left="0.2cm" fo:padding-right="0.2cm" fo:border-top="none" fo:border-right="none" fo:border-bottom="0.5pt solid #E3E7EA" fo:border-left="none" style:vertical-align="top"/>
    </style:style>
    <style:style style:name="a46" style:family="table-cell">
      <style:table-cell-properties fo:background-color="#FFFFFF" fo:padding-top="0.14cm" fo:padding-bottom="0.14cm" fo:padding-left="0.2cm" fo:padding-right="0.2cm" fo:border-top="none" fo:border-right="none" fo:border-bottom="0.5pt solid #E3E7EA" fo:border-left="none" style:vertical-align="top"/>
    </style:style>
    <style:style style:name="a47" style:family="table-cell">
      <style:table-cell-properties fo:background-color="#F5F9FB" fo:padding-top="0.14cm" fo:padding-bottom="0.14cm" fo:padding-left="0.2cm" fo:padding-right="0.2cm" fo:border-top="none" fo:border-right="none" fo:border-bottom="0.5pt solid #E3E7EA" fo:border-left="none" style:vertical-align="top"/>
    </style:style>
    <style:style style:name="a48" style:family="table">
      <style:table-properties style:width="16cm" table:align="left" fo:margin-top="0.25cm" fo:margin-bottom="0.4cm"/>
    </style:style>
    <style:style style:name="a49" style:family="table-column">
      <style:table-column-properties style:column-width="16cm"/>
    </style:style>
    <style:style style:name="a50" style:family="table-cell">
      <style:table-cell-properties fo:background-color="#FEF2F2" fo:padding="0.32cm" fo:border="none" fo:border-left="3pt solid #DC2626"/>
    </style:style>
    <style:style style:name="a51" style:family="paragraph" style:parent-style-name="CoTitle">
      <style:text-properties fo:color="#B91C1C"/>
    </style:style>
    <style:style style:name="a52" style:family="table">
      <style:table-properties style:width="16.0cm" table:align="left" fo:margin-top="0.15cm" fo:margin-bottom="0.4cm"/>
    </style:style>
    <style:style style:name="a53" style:family="table-column">
      <style:table-column-properties style:column-width="4.6cm"/>
    </style:style>
    <style:style style:name="a54" style:family="table-column">
      <style:table-column-properties style:column-width="11.4cm"/>
    </style:style>
    <style:style style:name="a55" style:family="table-cell">
      <style:table-cell-properties fo:background-color="#0B3D4C" fo:padding-top="0.14cm" fo:padding-bottom="0.14cm" fo:padding-left="0.2cm" fo:padding-right="0.2cm" fo:border-top="none" fo:border-right="none" fo:border-bottom="0.5pt solid #E3E7EA" fo:border-left="none" style:vertical-align="top"/>
    </style:style>
    <style:style style:name="a56" style:family="table-cell">
      <style:table-cell-properties fo:background-color="#FFFFFF" fo:padding-top="0.14cm" fo:padding-bottom="0.14cm" fo:padding-left="0.2cm" fo:padding-right="0.2cm" fo:border-top="none" fo:border-right="none" fo:border-bottom="0.5pt solid #E3E7EA" fo:border-left="none" style:vertical-align="top"/>
    </style:style>
    <style:style style:name="a57" style:family="table-cell">
      <style:table-cell-properties fo:background-color="#F5F9FB" fo:padding-top="0.14cm" fo:padding-bottom="0.14cm" fo:padding-left="0.2cm" fo:padding-right="0.2cm" fo:border-top="none" fo:border-right="none" fo:border-bottom="0.5pt solid #E3E7EA" fo:border-left="none" style:vertical-align="top"/>
    </style:style>
  </office:automatic-styles>
  <office:body>
    <office:text>
      <table:table table:name="Cover" table:style-name="a1">
        <table:table-column table:style-name="a2"/>
        <table:table-row>
          <table:table-cell table:style-name="a3" office:value-type="string">
            <text:p text:style-name="CvLabel">FIGURUNICA · PAZARLAMA KİTİ</text:p>
            <text:p text:style-name="CvNum">03</text:p>
            <text:p text:style-name="CvTitle">Kurumsal &amp; Atölye Kiti</text:p>
            <text:p text:style-name="CvSub">Mekânınızda Atölye, kurumsal hediyelik ve endüstriyel 3D baskı — üç B2B teklifi, süreçleri, sınırları ve itiraz karşılama.</text:p>
            <text:p text:style-name="CvImg"><draw:frame draw:name="maskot" text:anchor-type="as-char" svg:width="3.1cm" svg:height="3.1cm" draw:z-index="0"><draw:image xlink:href="Pictures/maskot.png" xlink:type="simple" xlink:show="embed" xlink:actuate="onLoad"/></draw:frame></text:p>
            <text:p text:style-name="CvAud">Hedef kitle: kafe/restoran/okul/kreş/ofis sahipleri · etkinlik organizatörleri · kurumsal hediye alıcıları · mühendislik ve tasarım ekipleri</text:p>
          </table:table-cell>
        </table:table-row>
      </table:table>
      <table:table table:name="Ta4" table:style-name="a4">
        <table:table-column table:style-name="a5"/>
        <table:table-column table:style-name="a6"/>
        <table:table-row>
          <table:table-cell table:style-name="a8" office:value-type="string">
            <text:p text:style-name="TdK">Doküman</text:p>
          </table:table-cell>
          <table:table-cell table:style-name="a8" office:value-type="string">
            <text:p text:style-name="Td">03 — Kurumsal &amp; Atölye Kiti</text:p>
          </table:table-cell>
        </table:table-row>
        <table:table-row>
          <table:table-cell table:style-name="a9" office:value-type="string">
            <text:p text:style-name="TdK">Sürüm</text:p>
          </table:table-cell>
          <table:table-cell table:style-name="a9" office:value-type="string">
            <text:p text:style-name="Td">v1.0 · 13 Temmuz 2026</text:p>
          </table:table-cell>
        </table:table-row>
        <table:table-row>
          <table:table-cell table:style-name="a8" office:value-type="string">
            <text:p text:style-name="TdK">Kaynak</text:p>
          </table:table-cell>
          <table:table-cell table:style-name="a8" office:value-type="string">
            <text:p text:style-name="Td">Canlı ürün kodundan doğrulanmış bilgiler (9 alan, 311 bulgu)</text:p>
          </table:table-cell>
        </table:table-row>
        <table:table-row>
          <table:table-cell table:style-name="a9" office:value-type="string">
            <text:p text:style-name="TdK">Kullanım</text:p>
          </table:table-cell>
          <table:table-cell table:style-name="a9" office:value-type="string">
            <text:p text:style-name="Td">İç kullanım — pazarlama ve satış ekibi</text:p>
          </table:table-cell>
        </table:table-row>
      </table:table>
      <table:table table:name="Ca10" table:style-name="a10">
        <table:table-column table:style-name="a11"/>
        <table:table-row>
          <table:table-cell table:style-name="a12" office:value-type="string">
            <text:p text:style-name="a13">Bu doküman müşteriye/partnere olduğu gibi verilmez.</text:p>
            <text:p text:style-name="CoBody">İçinde “asla söylemeyin” bölümü ve netleştirilmemiş operasyonel sorular vardır. Dışarıya çıkacak materyali bu dokümandan <text:span text:style-name="B">üretin</text:span>, dokümanı <text:span text:style-name="B">paylaşmayın</text:span>.</text:p>
          </table:table-cell>
        </table:table-row>
      </table:table>
      <text:p text:style-name="H1PB">İçindekiler</text:p>
      <text:p text:style-name="TocItem">1.  Üç kurumsal teklif</text:p>
      <text:p text:style-name="TocItem">2.  Teklif 1 — Mekânınızda Atölye</text:p>
      <text:p text:style-name="TocItem">3.  Teklif 2 — Kurumsal hediyelik</text:p>
      <text:p text:style-name="TocItem">4.  Teklif 3 — Endüstriyel / maker 3D baskı</text:p>
      <text:p text:style-name="TocItem">5.  İtiraz karşılama</text:p>
      <text:p text:style-name="TocItem">6.  Asla söylemeyin</text:p>
      <text:p text:style-name="TocItem">7.  Kurumsal görüşme öncesi netleştirilecekler</text:p>
      <text:p text:style-name="TocItem">8.  İletişim</text:p>
      <text:h text:style-name="H1" text:outline-level="1">Üç kurumsal teklif</text:h>
      <table:table table:name="Ta14" table:style-name="a14">
        <table:table-column table:style-name="a15"/>
        <table:table-column table:style-name="a16"/>
        <table:table-column table:style-name="a17"/>
        <table:table-header-rows>
          <table:table-row>
            <table:table-cell table:style-name="a18" office:value-type="string">
              <text:p text:style-name="Th">Teklif</text:p>
            </table:table-cell>
            <table:table-cell table:style-name="a18" office:value-type="string">
              <text:p text:style-name="Th">Kime</text:p>
            </table:table-cell>
            <table:table-cell table:style-name="a18" office:value-type="string">
              <text:p text:style-name="Th">Fiyat</text:p>
            </table:table-cell>
          </table:table-row>
        </table:table-header-rows>
        <table:table-row>
          <table:table-cell table:style-name="a19" office:value-type="string">
            <text:p text:style-name="TdK"><text:span text:style-name="B">Mekânınızda Atölye</text:span></text:p>
          </table:table-cell>
          <table:table-cell table:style-name="a19" office:value-type="string">
            <text:p text:style-name="Td">Kafe, restoran, okul, kreş, ofis, etkinlik salonu, ev — uygulamalı figür boyama &amp; tasarım deneyimi</text:p>
          </table:table-cell>
          <table:table-cell table:style-name="a19" office:value-type="string">
            <text:p text:style-name="Td">Sabit fiyat yok — her etkinliğe özel teklif</text:p>
          </table:table-cell>
        </table:table-row>
        <table:table-row>
          <table:table-cell table:style-name="a20" office:value-type="string">
            <text:p text:style-name="TdK"><text:span text:style-name="B">Kurumsal hediyelik</text:span></text:p>
          </table:table-cell>
          <table:table-cell table:style-name="a20" office:value-type="string">
            <text:p text:style-name="Td">Çalışan/müşteri hediyesi, etkinlik hatırası: fotoğraftan figür, anahtarlık, magnet, gece lambası</text:p>
          </table:table-cell>
          <table:table-cell table:style-name="a20" office:value-type="string">
            <text:p text:style-name="Td">Anahtarlık ₺149 · Magnet ₺129 · Gece lambası ₺399 · Figür ₺899’dan başlar</text:p>
          </table:table-cell>
        </table:table-row>
        <table:table-row>
          <table:table-cell table:style-name="a19" office:value-type="string">
            <text:p text:style-name="TdK"><text:span text:style-name="B">Endüstriyel 3D baskı</text:span></text:p>
          </table:table-cell>
          <table:table-cell table:style-name="a19" office:value-type="string">
            <text:p text:style-name="Td">Kendi STL/OBJ dosyasını bastırmak isteyen mühendislik, mimarlık, tasarım ve maker ekipleri</text:p>
          </table:table-cell>
          <table:table-cell table:style-name="a19" office:value-type="string">
            <text:p text:style-name="Td">Hacim bazlı otomatik fiyat veya özel teklif</text:p>
          </table:table-cell>
        </table:table-row>
      </table:table>
      <text:p text:style-name="Note">Üçünde de Türkiye içi kargo ücretsizdir ve tüm fiyatlar KDV dahildir.</text:p>
      <text:h text:style-name="H1PB" text:outline-level="1">Teklif 1 — Mekânınızda Atölye</text:h>
      <text:p text:style-name="Lead">Kafe, restoran, okul, kreş, ofis, etkinlik salonu ya da eve, uygulamalı figür boyama ve tasarım atölyesini biz getiriyoruz. <text:span text:style-name="B">Tüm malzeme ve ekipman bizden.</text:span> Katılımcı sayısı ve konsepte göre size özel program ve teklif hazırlıyoruz.</text:p>
      <text:h text:style-name="H2" text:outline-level="2">Kapsam</text:h>
      <table:table table:name="Ta21" table:style-name="a21">
        <table:table-column table:style-name="a22"/>
        <table:table-column table:style-name="a23"/>
        <table:table-header-rows>
          <table:table-row>
            <table:table-cell table:style-name="a24" office:value-type="string">
              <text:p text:style-name="Th"/>
            </table:table-cell>
            <table:table-cell table:style-name="a24" office:value-type="string">
              <text:p text:style-name="Th">Seçenekler</text:p>
            </table:table-cell>
          </table:table-row>
        </table:table-header-rows>
        <table:table-row>
          <table:table-cell table:style-name="a25" office:value-type="string">
            <text:p text:style-name="TdK">Mekân türü</text:p>
          </table:table-cell>
          <table:table-cell table:style-name="a25" office:value-type="string">
            <text:p text:style-name="Td">Kafe · Restoran · Okul · Anaokulu/Kreş · Kurumsal/Ofis · Etkinlik salonu · Ev · Diğer</text:p>
          </table:table-cell>
        </table:table-row>
        <table:table-row>
          <table:table-cell table:style-name="a26" office:value-type="string">
            <text:p text:style-name="TdK">Etkinlik türü</text:p>
          </table:table-cell>
          <table:table-cell table:style-name="a26" office:value-type="string">
            <text:p text:style-name="Td">Doğum günü · Kurumsal / takım etkinliği · Okul / sınıf · Özel grup · Diğer</text:p>
          </table:table-cell>
        </table:table-row>
        <table:table-row>
          <table:table-cell table:style-name="a25" office:value-type="string">
            <text:p text:style-name="TdK">Yaş grubu</text:p>
          </table:table-cell>
          <table:table-cell table:style-name="a25" office:value-type="string">
            <text:p text:style-name="Td">Çocuk (4–12) · Genç (13–17) · Yetişkin (18+) · Karışık</text:p>
          </table:table-cell>
        </table:table-row>
        <table:table-row>
          <table:table-cell table:style-name="a26" office:value-type="string">
            <text:p text:style-name="TdK">Katılımcı sayısı</text:p>
          </table:table-cell>
          <table:table-cell table:style-name="a26" office:value-type="string">
            <text:p text:style-name="Td">1 – 1000</text:p>
          </table:table-cell>
        </table:table-row>
        <table:table-row>
          <table:table-cell table:style-name="a25" office:value-type="string">
            <text:p text:style-name="TdK">Konum</text:p>
          </table:table-cell>
          <table:table-cell table:style-name="a25" office:value-type="string">
            <text:p text:style-name="Td">Türkiye’nin 81 ilinden talep gönderilebilir (stüdyomuz Ankara/Etimesgut’ta)</text:p>
          </table:table-cell>
        </table:table-row>
      </table:table>
      <text:h text:style-name="H2" text:outline-level="2">Süreç</text:h>
      <text:list text:style-name="OL">
        <text:list-item>
          <text:p text:style-name="ListBody">Mekân sahibi <text:span text:style-name="B">figurunica.com/atolye</text:span> formunu doldurur: tercih edilen ve alternatif tarih, kurum adı, katılımcı sayısı, yaş grubu, özel istekler, bütçe (opsiyonel) ve il/ilçe. Üyelik gerekmez.</text:p>
        </text:list-item>
        <text:list-item>
          <text:p text:style-name="ListBody">Talebe <text:span text:style-name="B">WS-XXXXXX</text:span> takip referansı verilir ve anında onay e-postası gider.</text:p>
        </text:list-item>
        <text:list-item>
          <text:p text:style-name="ListBody">Talep sırayla <text:span text:style-name="B">Yeni → İnceleniyor → Planlandı → Tamamlandı</text:span> aşamalarından geçer.</text:p>
        </text:list-item>
        <text:list-item>
          <text:p text:style-name="ListBody"><text:span text:style-name="B">Planlandı</text:span> aşamasında tarih, teklif tutarı ve adres yazılı olarak e-postayla iletilir.</text:p>
        </text:list-item>
      </text:list>
      <table:table table:name="Ca27" table:style-name="a27">
        <table:table-column table:style-name="a28"/>
        <table:table-row>
          <table:table-cell table:style-name="a29" office:value-type="string">
            <text:p text:style-name="a30">Formda ne söylüyoruz</text:p>
            <text:p text:style-name="CoBody">“Mekânınıza geliyoruz — tüm malzeme ve ekipmanı biz getiriyoruz.”</text:p>
            <text:p text:style-name="CoBody">“Her yaş grubuna uyarlanabilen figür boyama &amp; tasarım deneyimi.”</text:p>
            <text:p text:style-name="CoBody">“Anahtar teslim: katılımcı sayısı ve konsepte göre size özel program ve teklif.”</text:p>
            <text:p text:style-name="CoBody">Form <text:span text:style-name="B">bağlayıcı bir sipariş oluşturmaz</text:span> — bunu görüşmede de açıkça söyleyin, dönüşümü artırır.</text:p>
          </table:table-cell>
        </table:table-row>
      </table:table>
      <text:p text:style-name="Note">KVKK açık rızası formda zorunludur ve zaman damgasıyla kayıt altına alınır.</text:p>
      <text:h text:style-name="H1PB" text:outline-level="1">Teklif 2 — Kurumsal hediyelik</text:h>
      <text:p text:style-name="Lead">Fotoğraftan üretilen kişiye özel hediyelikler: figür, anahtarlık, buzdolabı magneti ve gece lambası. Sabit fiyat, sitede gerçek ödeme, Türkiye içi ücretsiz kargo.</text:p>
      <table:table table:name="Ta31" table:style-name="a31">
        <table:table-column table:style-name="a32"/>
        <table:table-column table:style-name="a33"/>
        <table:table-column table:style-name="a34"/>
        <table:table-header-rows>
          <table:table-row>
            <table:table-cell table:style-name="a35" office:value-type="string">
              <text:p text:style-name="Th">Ürün</text:p>
            </table:table-cell>
            <table:table-cell table:style-name="a35" office:value-type="string">
              <text:p text:style-name="Th">Fiyat</text:p>
            </table:table-cell>
            <table:table-cell table:style-name="a35" office:value-type="string">
              <text:p text:style-name="Th">Not</text:p>
            </table:table-cell>
          </table:table-row>
        </table:table-header-rows>
        <table:table-row>
          <table:table-cell table:style-name="a36" office:value-type="string">
            <text:p text:style-name="TdK">Anahtarlık</text:p>
          </table:table-cell>
          <table:table-cell table:style-name="a36" office:value-type="string">
            <text:p text:style-name="Td">₺149</text:p>
          </table:table-cell>
          <table:table-cell table:style-name="a36" office:value-type="string">
            <text:p text:style-name="Td">Fotoğraftan üretim, sabit fiyat</text:p>
          </table:table-cell>
        </table:table-row>
        <table:table-row>
          <table:table-cell table:style-name="a37" office:value-type="string">
            <text:p text:style-name="TdK">Buzdolabı magneti</text:p>
          </table:table-cell>
          <table:table-cell table:style-name="a37" office:value-type="string">
            <text:p text:style-name="Td">₺129</text:p>
          </table:table-cell>
          <table:table-cell table:style-name="a37" office:value-type="string">
            <text:p text:style-name="Td">Fotoğraftan üretim, sabit fiyat</text:p>
          </table:table-cell>
        </table:table-row>
        <table:table-row>
          <table:table-cell table:style-name="a36" office:value-type="string">
            <text:p text:style-name="TdK">Gece lambası</text:p>
          </table:table-cell>
          <table:table-cell table:style-name="a36" office:value-type="string">
            <text:p text:style-name="Td">₺399</text:p>
          </table:table-cell>
          <table:table-cell table:style-name="a36" office:value-type="string">
            <text:p text:style-name="Td">Fotoğraftan üretim, sabit fiyat</text:p>
          </table:table-cell>
        </table:table-row>
        <table:table-row>
          <table:table-cell table:style-name="a37" office:value-type="string">
            <text:p text:style-name="TdK">Kişiye özel figür</text:p>
          </table:table-cell>
          <table:table-cell table:style-name="a37" office:value-type="string">
            <text:p text:style-name="Td">₺899 – ₺1.799</text:p>
          </table:table-cell>
          <table:table-cell table:style-name="a37" office:value-type="string">
            <text:p text:style-name="Td">Malzeme ve boyuta göre; el boyaması +₺1.000, lüks vitrin +₺2.000</text:p>
          </table:table-cell>
        </table:table-row>
        <table:table-row>
          <table:table-cell table:style-name="a36" office:value-type="string">
            <text:p text:style-name="TdK">Logo / 2D tasarımdan ürün</text:p>
          </table:table-cell>
          <table:table-cell table:style-name="a36" office:value-type="string">
            <text:p text:style-name="Td">₺549 – ₺1.499</text:p>
          </table:table-cell>
          <table:table-cell table:style-name="a36" office:value-type="string">
            <text:p text:style-name="Td">Kurum logosu, çizim veya düz görselden 3D ürün</text:p>
          </table:table-cell>
        </table:table-row>
      </table:table>
      <text:h text:style-name="H2" text:outline-level="2">Kurumsal alıcıya avantaj</text:h>
      <text:list text:style-name="UL">
        <text:list-item>
          <text:p text:style-name="ListBody"><text:span text:style-name="B">Havale/EFT ile %3 indirim</text:span> — kurumsal transferle ödeyen için doğrudan avantaj. Ödeme için 72 saat süre vardır, 24. saatte hatırlatma e-postası gider.</text:p>
        </text:list-item>
        <text:list-item>
          <text:p text:style-name="ListBody"><text:span text:style-name="B">Sipariş kaynağı ölçülebilir:</text:span> kampanya/kanal bilgisi siparişe yazılır; yönetim panelinde kanal bazlı ciro raporu vardır. Kurumsal kampanyaların getirisi raporlanabilir.</text:p>
        </text:list-item>
        <text:list-item>
          <text:p text:style-name="ListBody"><text:span text:style-name="B">Hediye kartı</text:span> ödeme adımında kullanılabilir (bakiye bazlı, kısmi kullanılabilir).</text:p>
        </text:list-item>
        <text:list-item>
          <text:p text:style-name="ListBody">Anahtarlık/magnet/lamba yalnızca <text:span text:style-name="B">figurunica.com/urunler</text:span> sayfasından satılır — figür tasarım ekranında görünmez.</text:p>
        </text:list-item>
      </text:list>
      <table:table table:name="Ca38" table:style-name="a38">
        <table:table-column table:style-name="a39"/>
        <table:table-row>
          <table:table-cell table:style-name="a40" office:value-type="string">
            <text:p text:style-name="a41">Kurumsal satışta bilmeniz gereken üç sınır</text:p>
            <text:p text:style-name="CoBody"><text:span text:style-name="B">Sepette satır başına en fazla 20 adet</text:span> alınabilir. Daha büyük hacimli talepler self-servis yapılamaz; WhatsApp veya e-posta üzerinden ekiple ilerlemek gerekir.</text:p>
            <text:p text:style-name="CoBody"><text:span text:style-name="B">Toplu alım indirimi ve indirim kuponu sistemde yoktur.</text:span> Tek indirim mekanizmaları: %3 havale indirimi ve hediye kartı.</text:p>
            <text:p text:style-name="CoBody"><text:span text:style-name="B">Sipariş akışında VKN / firma unvanı gibi kurumsal fatura alanları yoktur</text:span> ve e-fatura entegrasyonu bulunmamaktadır. Kurumsal faturalama ekiple manuel yürütülür — büyük hesapta bunu görüşmenin başında söyleyin.</text:p>
          </table:table-cell>
        </table:table-row>
      </table:table>
      <text:h text:style-name="H1PB" text:outline-level="1">Teklif 3 — Endüstriyel / maker 3D baskı</text:h>
      <text:p text:style-name="Lead">Elinizdeki STL veya OBJ dosyasını yükleyin, baskı yüksekliğini ve malzemeyi seçin. Uygun modellerde fiyat hacimden otomatik hesaplanır; büyük ve karmaşık işlerde ekibimiz özel teklif hazırlar. Bu yolda yapay zekâ yoktur, üyelik gerekmez.</text:p>
      <table:table table:name="Ta42" table:style-name="a42">
        <table:table-column table:style-name="a43"/>
        <table:table-column table:style-name="a44"/>
        <table:table-header-rows>
          <table:table-row>
            <table:table-cell table:style-name="a45" office:value-type="string">
              <text:p text:style-name="Th"/>
            </table:table-cell>
            <table:table-cell table:style-name="a45" office:value-type="string">
              <text:p text:style-name="Th">Detay</text:p>
            </table:table-cell>
          </table:table-row>
        </table:table-header-rows>
        <table:table-row>
          <table:table-cell table:style-name="a46" office:value-type="string">
            <text:p text:style-name="TdK">Dosya</text:p>
          </table:table-cell>
          <table:table-cell table:style-name="a46" office:value-type="string">
            <text:p text:style-name="Td">STL veya OBJ · en fazla 50 MB</text:p>
          </table:table-cell>
        </table:table-row>
        <table:table-row>
          <table:table-cell table:style-name="a47" office:value-type="string">
            <text:p text:style-name="TdK">Baskı yüksekliği</text:p>
          </table:table-cell>
          <table:table-cell table:style-name="a47" office:value-type="string">
            <text:p text:style-name="Td">40 / 60 / 80 / 120 / 160 mm (varsayılan 80 mm)</text:p>
          </table:table-cell>
        </table:table-row>
        <table:table-row>
          <table:table-cell table:style-name="a46" office:value-type="string">
            <text:p text:style-name="TdK">Malzeme</text:p>
          </table:table-cell>
          <table:table-cell table:style-name="a46" office:value-type="string">
            <text:p text:style-name="Td">Reçine (SLA) veya filament (FDM)</text:p>
          </table:table-cell>
        </table:table-row>
        <table:table-row>
          <table:table-cell table:style-name="a47" office:value-type="string">
            <text:p text:style-name="TdK">Fiyat formülü</text:p>
          </table:table-cell>
          <table:table-cell table:style-name="a47" office:value-type="string">
            <text:p text:style-name="Td"><text:span text:style-name="B">Reçine:</text:span> ₺99 baz + ₺15/cm³ (en az ₺199)<text:line-break/><text:span text:style-name="B">Filament:</text:span> ₺69 baz + ₺9/cm³ (en az ₺149)</text:p>
          </table:table-cell>
        </table:table-row>
        <table:table-row>
          <table:table-cell table:style-name="a46" office:value-type="string">
            <text:p text:style-name="TdK">Bitiş</text:p>
          </table:table-cell>
          <table:table-cell table:style-name="a46" office:value-type="string">
            <text:p text:style-name="Td">Ham +₺0 · Pürüzsüz (zımpara + astar) +₺150 · Boyalı (tek renk) +₺400</text:p>
          </table:table-cell>
        </table:table-row>
        <table:table-row>
          <table:table-cell table:style-name="a47" office:value-type="string">
            <text:p text:style-name="TdK">Baskı zarfı</text:p>
          </table:table-cell>
          <table:table-cell table:style-name="a47" office:value-type="string">
            <text:p text:style-name="Td">220 × 220 × 250 mm</text:p>
          </table:table-cell>
        </table:table-row>
        <table:table-row>
          <table:table-cell table:style-name="a46" office:value-type="string">
            <text:p text:style-name="TdK">Özel teklif</text:p>
          </table:table-cell>
          <table:table-cell table:style-name="a46" office:value-type="string">
            <text:p text:style-name="Td">Zarfı aşan, kapalı hacim oluşturmayan veya otomatik fiyatı ₺50.000’i geçen modeller <text:span text:style-name="B">reddedilmez</text:span> — ekip elle teklif hazırlar. Teklifte fiyat ve “siparişe çevir &amp; öde” bağlantısı e-postayla gider; <text:span text:style-name="B">teklif 7 gün geçerlidir.</text:span></text:p>
          </table:table-cell>
        </table:table-row>
      </table:table>
      <text:h text:style-name="H2" text:outline-level="2">Gizlilik — mühendislik müşterisinin ilk sorusu</text:h>
      <text:p text:style-name="Body">Yüklenen baskı dosyaları açıkta değildir: yalnızca siparişi atanan üretici, oturum ve atama kontrolünden geçen bir indirme ucundan dosyayı çekebilir. Dosyalar mağaza ziyaretçilerine veya diğer müşterilere hiçbir zaman gösterilmez. Bu siparişler “model hazırlığı” adımını atlar, doğrudan üretime girer.</text:p>
      <text:h text:style-name="H1" text:outline-level="1">İtiraz karşılama</text:h>
      <text:p text:style-name="QaQ">Atölye ne kadara mal olur?</text:p>
      <text:p text:style-name="QaA">Sabit paket fiyatımız yok; katılımcı sayısı ve konsepte göre size özel teklif hazırlıyoruz ve teklifi yazılı olarak e-postayla iletiyoruz.</text:p>
      <text:p text:style-name="QaQ">Formu doldurursam taahhüt altına girer miyim?</text:p>
      <text:p text:style-name="QaA">Hayır. Form bağlayıcı bir sipariş oluşturmaz; talebiniz ekibe ulaşır ve size dönüş yapılır.</text:p>
      <text:p text:style-name="QaQ">Bizim şehre gelir misiniz?</text:p>
      <text:p text:style-name="QaA">Türkiye’nin 81 ilinden talep gönderilebiliyor; stüdyomuz Ankara/Etimesgut’ta. Şehrinize gelip gelemeyeceğimizi teklif aşamasında netleştiriyoruz.</text:p>
      <text:p text:style-name="QaQ">Atölyeyi siteden online ödeyebilir miyim?</text:p>
      <text:p text:style-name="QaA">Şu an hayır — teklif e-postayla iletiliyor, ödeme ve planlama ekibimizle yürütülüyor.</text:p>
      <text:p text:style-name="QaQ">Toplu alım indirimi var mı?</text:p>
      <text:p text:style-name="QaA">Adet bazlı toplu alım indirimi veya kupon kodu sistemde yok. Tek indirim mekanizmaları: %3 havale indirimi ve hediye kartı.</text:p>
      <text:p text:style-name="QaQ">Kurumsal fatura kesiyor musunuz?</text:p>
      <text:p text:style-name="QaA">Sipariş akışında VKN/firma unvanı gibi kurumsal fatura alanları henüz yok; ödemesi tamamlanan siparişte müşteri KDV ayrıştırmalı fatura dökümünü hesabından görüntüleyebiliyor. Kurumsal faturalama için ekiple iletişime geçilmesi gerekiyor.</text:p>
      <text:p text:style-name="QaQ">500 adet hediyelik istiyorum, siteden alabilir miyim?</text:p>
      <text:p text:style-name="QaA">Sepette satır başına en fazla 20 adet alınabiliyor; bu hacimdeki talepler ekiple yürütülür. WhatsApp veya e-postadan bize ulaşın.</text:p>
      <text:p text:style-name="QaQ">Dosyamı yüklersem fiyatı hemen görür müyüm?</text:p>
      <text:p text:style-name="QaA">Uygun geometrideki modellerde evet, fiyat hacimden hesaplanır. Model kapalı hacim değilse, baskı zarfına sığmıyorsa veya geometri ölçülemezse talep özel teklife düşer ve fiyatı e-postayla iletiriz.</text:p>
      <text:h text:style-name="H1PB" text:outline-level="1">Asla söylemeyin</text:h>
      <table:table table:name="Ca48" table:style-name="a48">
        <table:table-column table:style-name="a49"/>
        <table:table-row>
          <table:table-cell table:style-name="a50" office:value-type="string">
            <text:p text:style-name="a51">Kurumsal müşteriye verilen yanlış söz, sözleşme aşamasında patlar</text:p>
            <text:p text:style-name="CoBody">B2B alıcı satın alma öncesi her vaadi doğrular. Aşağıdakiler sistemde YOKTUR.</text:p>
          </table:table-cell>
        </table:table-row>
      </table:table>
      <text:list text:style-name="UL">
        <text:list-item>
          <text:p text:style-name="ListBody"><text:span text:style-name="B">Atölyede sabit fiyat (“kişi başı ₺X”), sabit süre veya sabit paket içeriği VAAT ETMEYİN.</text:span> Sistemde atölye fiyat listesi yoktur; her talep elle fiyatlanır. (Formdaki “₺500” yalnızca bir örnek metindir.)</text:p>
        </text:list-item>
        <text:list-item>
          <text:p text:style-name="ListBody"><text:span text:style-name="B">“Atölye talebinizi online takip edin” demeyin</text:span> — müşteri tarafında atölye takip sayfası yoktur; yalnızca e-posta ve WS- referansı vardır. Atölyeyi siteden online ödeme yolu da yoktur.</text:p>
        </text:list-item>
        <text:list-item>
          <text:p text:style-name="ListBody"><text:span text:style-name="B">“Kurumsal faturalı self-servis satış” vaat etmeyin</text:span> — sipariş akışında VKN/firma unvanı/e-fatura alanı yoktur. Ayrı bir kurumsal sayfa da bulunmuyor.</text:p>
        </text:list-item>
        <text:list-item>
          <text:p text:style-name="ListBody"><text:span text:style-name="B">“E-faturanız otomatik düzenlenir / e-arşiv kesiyoruz” demeyin</text:span> — e-fatura entegrasyonu yoktur.</text:p>
        </text:list-item>
        <text:list-item>
          <text:p text:style-name="ListBody"><text:span text:style-name="B">“Kampanya kodu / toplu alım indirimi” vaat etmeyin</text:span> — kupon motoru yoktur.</text:p>
        </text:list-item>
        <text:list-item>
          <text:p text:style-name="ListBody"><text:span text:style-name="B">Sepette 20 adet üstü toplu siparişi self-servis olarak vaat etmeyin.</text:span></text:p>
        </text:list-item>
        <text:list-item>
          <text:p text:style-name="ListBody"><text:span text:style-name="B">“Size ödeme linki gönderelim” akışını duyurmayın</text:span> — bu akış canlıda kullanılmıyor.</text:p>
        </text:list-item>
        <text:list-item>
          <text:p text:style-name="ListBody"><text:span text:style-name="B">“Yüklediğiniz her modele anında otomatik fiyat” demeyin</text:span> — geometri işlenemezse veya zarf aşılırsa talep sessizce özel teklife düşer.</text:p>
        </text:list-item>
        <text:list-item>
          <text:p text:style-name="ListBody"><text:span text:style-name="B">Teslim sürelerini “garanti” diye sunmayın</text:span> — süreler tahminidir.</text:p>
        </text:list-item>
        <text:list-item>
          <text:p text:style-name="ListBody"><text:span text:style-name="B">“Dünyaya gönderim” demeyin</text:span> — yalnızca Türkiye içi teslimat vardır.</text:p>
        </text:list-item>
      </text:list>
      <text:h text:style-name="H1" text:outline-level="1">Kurumsal görüşme öncesi netleştirilecekler</text:h>
      <text:list text:style-name="OL">
        <text:list-item>
          <text:p text:style-name="ListBody">Atölye için verilebilecek bir <text:span text:style-name="B">referans fiyat bandı</text:span> var mı? (Kişi başı veya paket — satış konuşmasında bir bant olmadan ilerlemek zor.)</text:p>
        </text:list-item>
        <text:list-item>
          <text:p text:style-name="ListBody">Atölye <text:span text:style-name="B">hizmet bölgemiz</text:span> neresi? 81 ilden talep alıyoruz ama stüdyo Ankara’da — fiilen hangi illere gidiyoruz?</text:p>
        </text:list-item>
        <text:list-item>
          <text:p text:style-name="ListBody"><text:span text:style-name="B">E-fatura / e-arşiv</text:span> gerçek entegrasyonu ne zaman geliyor? Kurumsal satışta bu bir engel.</text:p>
        </text:list-item>
        <text:list-item>
          <text:p text:style-name="ListBody">20 adet üstü toplu siparişte <text:span text:style-name="B">operasyonel kapasitemiz</text:span> ne? Kaç günde kaç adet üretebiliyoruz?</text:p>
        </text:list-item>
        <text:list-item>
          <text:p text:style-name="ListBody">Toplu kurumsal siparişte özel fiyat verebiliyor muyuz — yoksa liste fiyatı mı geçerli?</text:p>
        </text:list-item>
      </text:list>
      <text:h text:style-name="H1" text:outline-level="1">İletişim</text:h>
      <table:table table:name="Ta52" table:style-name="a52">
        <table:table-column table:style-name="a53"/>
        <table:table-column table:style-name="a54"/>
        <table:table-row>
          <table:table-cell table:style-name="a56" office:value-type="string">
            <text:p text:style-name="TdK">Web</text:p>
          </table:table-cell>
          <table:table-cell table:style-name="a56" office:value-type="string">
            <text:p text:style-name="Td">figurunica.com</text:p>
          </table:table-cell>
        </table:table-row>
        <table:table-row>
          <table:table-cell table:style-name="a57" office:value-type="string">
            <text:p text:style-name="TdK">E-posta</text:p>
          </table:table-cell>
          <table:table-cell table:style-name="a57" office:value-type="string">
            <text:p text:style-name="Td">info@figurunica.com</text:p>
          </table:table-cell>
        </table:table-row>
        <table:table-row>
          <table:table-cell table:style-name="a56" office:value-type="string">
            <text:p text:style-name="TdK">Telefon / WhatsApp</text:p>
          </table:table-cell>
          <table:table-cell table:style-name="a56" office:value-type="string">
            <text:p text:style-name="Td">+90 850 840 73 03</text:p>
          </table:table-cell>
        </table:table-row>
        <table:table-row>
          <table:table-cell table:style-name="a57" office:value-type="string">
            <text:p text:style-name="TdK">Stüdyo</text:p>
          </table:table-cell>
          <table:table-cell table:style-name="a57" office:value-type="string">
            <text:p text:style-name="Td">Şehit Osman Avcı Mah., Akın 688 Sitesi B32, Etimesgut / Ankara</text:p>
          </table:table-cell>
        </table:table-row>
        <table:table-row>
          <table:table-cell table:style-name="a56" office:value-type="string">
            <text:p text:style-name="TdK">Sipariş takibi</text:p>
          </table:table-cell>
          <table:table-cell table:style-name="a56" office:value-type="string">
            <text:p text:style-name="Td">figurunica.com/track/&lt;sipariş-numarası&gt; — üyelik gerekmez</text:p>
          </table:table-cell>
        </table:table-row>
      </table:table>
      <text:p text:style-name="Note">Bu doküman canlı koddan doğrulanmış bilgilerle üretilmiştir (sürüm v1.0 · 13 Temmuz 2026). Fiyat veya politika değiştiğinde pazarlama ekibi güncel sürümü talep etmelid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svg="urn:oasis:names:tc:opendocument:xmlns:svg-compatible:1.0" xmlns:meta="urn:oasis:names:tc:opendocument:xmlns:meta:1.0" xmlns:dc="http://purl.org/dc/elements/1.1/" office:version="1.3">
  <office:font-face-decls>
    <style:font-face style:name="Liberation Sans" svg:font-family="'Liberation Sans', Arial, sans-serif" style:font-family-generic="swiss" style:font-pitch="variable"/>
  </office:font-face-decls>
  <office:styles>
    <style:default-style style:family="paragraph">
      <style:paragraph-properties fo:hyphenate="false" style:line-height-at-least="0.42cm"/>
      <style:text-properties style:font-name="Liberation Sans" fo:font-size="10.5pt" fo:color="#0B0C0F" fo:language="tr" fo:country="TR"/>
    </style:default-style>
    <style:style style:name="Standard" style:family="paragraph">
      <style:paragraph-properties fo:margin-bottom="0.26cm" fo:line-height="138%"/>
      <style:text-properties style:font-name="Liberation Sans" fo:font-size="10.5pt" fo:color="#0B0C0F"/>
    </style:style>
    <style:style style:name="Body" style:family="paragraph" style:parent-style-name="Standard">
      <style:paragraph-properties fo:margin-bottom="0.26cm" fo:line-height="138%" fo:text-align="justify"/>
    </style:style>
    <style:style style:name="Lead" style:family="paragraph" style:parent-style-name="Standard">
      <style:paragraph-properties fo:margin-bottom="0.36cm" fo:line-height="146%"/>
      <style:text-properties fo:font-size="11.5pt" fo:color="#44464E"/>
    </style:style>
    <style:style style:name="Note" style:family="paragraph" style:parent-style-name="Standard">
      <style:paragraph-properties fo:margin-top="0.1cm" fo:margin-bottom="0.3cm"/>
      <style:text-properties fo:font-size="9.5pt" fo:font-style="italic" fo:color="#8A8C93"/>
    </style:style>
    <style:style style:name="H1" style:family="paragraph" style:parent-style-name="Standard">
      <style:paragraph-properties fo:margin-top="0.75cm" fo:margin-bottom="0.3cm" fo:keep-with-next="always" fo:padding-bottom="0.12cm" fo:border-bottom="1.5pt solid #00D4FF" fo:border-top="none" fo:border-left="none" fo:border-right="none"/>
      <style:text-properties fo:font-size="16.5pt" fo:font-weight="bold" fo:color="#0B3D4C"/>
    </style:style>
    <style:style style:name="H1PB" style:family="paragraph" style:parent-style-name="H1">
      <style:paragraph-properties fo:margin-top="0.75cm" fo:margin-bottom="0.3cm" fo:keep-with-next="always" fo:padding-bottom="0.12cm" fo:border-bottom="1.5pt solid #00D4FF" fo:border-top="none" fo:border-left="none" fo:border-right="none" fo:break-before="page"/>
    </style:style>
    <style:style style:name="H2" style:family="paragraph" style:parent-style-name="Standard">
      <style:paragraph-properties fo:margin-top="0.5cm" fo:margin-bottom="0.18cm" fo:keep-with-next="always"/>
      <style:text-properties fo:font-size="12pt" fo:font-weight="bold" fo:color="#0E7490"/>
    </style:style>
    <style:style style:name="ListBody" style:family="paragraph" style:parent-style-name="Standard">
      <style:paragraph-properties fo:margin-bottom="0.16cm" fo:line-height="136%"/>
    </style:style>
    <style:style style:name="Quote" style:family="paragraph" style:parent-style-name="Standard">
      <style:paragraph-properties fo:margin-left="0.5cm" fo:margin-right="0.3cm" fo:margin-top="0.25cm" fo:margin-bottom="0.35cm" fo:padding="0.32cm" fo:background-color="#F5F9FB" fo:border-left="3pt solid #0891B2" fo:border-top="none" fo:border-bottom="none" fo:border-right="none" fo:line-height="150%"/>
      <style:text-properties fo:font-size="11.5pt" fo:font-style="italic" fo:color="#0B3D4C"/>
    </style:style>
    <style:style style:name="QaQ" style:family="paragraph" style:parent-style-name="Standard">
      <style:paragraph-properties fo:margin-top="0.28cm" fo:margin-bottom="0.08cm" fo:keep-with-next="always"/>
      <style:text-properties fo:font-size="10.5pt" fo:font-weight="bold" fo:color="#0B3D4C"/>
    </style:style>
    <style:style style:name="QaA" style:family="paragraph" style:parent-style-name="Standard">
      <style:paragraph-properties fo:margin-left="0.35cm" fo:margin-bottom="0.1cm" fo:line-height="138%"/>
    </style:style>
    <style:style style:name="Th" style:family="paragraph" style:parent-style-name="Standard">
      <style:paragraph-properties fo:margin-bottom="0cm"/>
      <style:text-properties fo:font-size="9.5pt" fo:font-weight="bold" fo:color="#FFFFFF"/>
    </style:style>
    <style:style style:name="Td" style:family="paragraph" style:parent-style-name="Standard">
      <style:paragraph-properties fo:margin-bottom="0cm" fo:line-height="130%"/>
      <style:text-properties fo:font-size="9.5pt"/>
    </style:style>
    <style:style style:name="TdK" style:family="paragraph" style:parent-style-name="Standard">
      <style:paragraph-properties fo:margin-bottom="0cm" fo:line-height="130%"/>
      <style:text-properties fo:font-size="9.5pt" fo:font-weight="bold" fo:color="#0B3D4C"/>
    </style:style>
    <style:style style:name="CoTitle" style:family="paragraph" style:parent-style-name="Standard">
      <style:paragraph-properties fo:margin-bottom="0.12cm"/>
      <style:text-properties fo:font-size="10.5pt" fo:font-weight="bold"/>
    </style:style>
    <style:style style:name="CoBody" style:family="paragraph" style:parent-style-name="Standard">
      <style:paragraph-properties fo:margin-bottom="0.1cm" fo:line-height="136%"/>
      <style:text-properties fo:font-size="10pt"/>
    </style:style>
    <style:style style:name="CvLabel" style:family="paragraph" style:parent-style-name="Standard">
      <style:paragraph-properties fo:margin-bottom="0.15cm"/>
      <style:text-properties fo:font-size="9pt" fo:font-weight="bold" fo:color="#00D4FF" fo:letter-spacing="0.06cm"/>
    </style:style>
    <style:style style:name="CvNum" style:family="paragraph" style:parent-style-name="Standard">
      <style:paragraph-properties fo:margin-bottom="0.1cm"/>
      <style:text-properties fo:font-size="40pt" fo:font-weight="bold" fo:color="#00D4FF"/>
    </style:style>
    <style:style style:name="CvTitle" style:family="paragraph" style:parent-style-name="Standard">
      <style:paragraph-properties fo:margin-bottom="0.25cm"/>
      <style:text-properties fo:font-size="30pt" fo:font-weight="bold" fo:color="#FFFFFF"/>
    </style:style>
    <style:style style:name="CvSub" style:family="paragraph" style:parent-style-name="Standard">
      <style:paragraph-properties fo:margin-bottom="0.3cm" fo:line-height="140%"/>
      <style:text-properties fo:font-size="11.5pt" fo:color="#CDF6FD"/>
    </style:style>
    <style:style style:name="CvAud" style:family="paragraph" style:parent-style-name="Standard">
      <style:paragraph-properties fo:margin-bottom="0cm"/>
      <style:text-properties fo:font-size="10pt" fo:font-weight="bold" fo:color="#00D4FF"/>
    </style:style>
    <style:style style:name="CvImg" style:family="paragraph" style:parent-style-name="Standard">
      <style:paragraph-properties fo:text-align="center" fo:margin-top="0.6cm" fo:margin-bottom="0.4cm"/>
    </style:style>
    <style:style style:name="TocItem" style:family="paragraph" style:parent-style-name="Standard">
      <style:paragraph-properties fo:margin-bottom="0.12cm" fo:margin-left="0.3cm"/>
      <style:text-properties fo:font-size="10.5pt"/>
    </style:style>
    <style:style style:name="Footer" style:family="paragraph" style:parent-style-name="Standard">
      <style:paragraph-properties fo:margin-bottom="0cm" fo:text-align="center"/>
      <style:text-properties fo:font-size="8.5pt" fo:color="#8A8C93"/>
    </style:style>
    <style:style style:name="B" style:family="text">
      <style:text-properties fo:font-weight="bold" fo:color="#0B3D4C"/>
    </style:style>
    <style:style style:name="BW" style:family="text">
      <style:text-properties fo:font-weight="bold" fo:color="#FFFFFF"/>
    </style:style>
    <text:list-style style:name="UL">
      <text:list-level-style-bullet text:level="1" text:bullet-char="•">
        <style:list-level-properties text:space-before="0.35cm" text:min-label-width="0.42cm"/>
        <style:text-properties style:font-name="Liberation Sans" fo:color="#0891B2"/>
      </text:list-level-style-bullet>
      <text:list-level-style-bullet text:level="2" text:bullet-char="–">
        <style:list-level-properties text:space-before="0.85cm" text:min-label-width="0.42cm"/>
        <style:text-properties style:font-name="Liberation Sans" fo:color="#0891B2"/>
      </text:list-level-style-bullet>
    </text:list-style>
    <text:list-style style:name="OL">
      <text:list-level-style-number text:level="1" style:num-suffix="." style:num-format="1">
        <style:list-level-properties text:space-before="0.35cm" text:min-label-width="0.55cm"/>
        <style:text-properties style:font-name="Liberation Sans" fo:font-weight="bold" fo:color="#0891B2"/>
      </text:list-level-style-number>
    </text:list-style>
  </office:styles>
  <office:automatic-styles>
    <style:page-layout style:name="PL">
      <style:page-layout-properties fo:page-width="21cm" fo:page-height="29.7cm" style:print-orientation="portrait" fo:margin-top="1.9cm" fo:margin-bottom="1.7cm" fo:margin-left="2.1cm" fo:margin-right="2.1cm"/>
      <style:footer-style>
        <style:header-footer-properties fo:min-height="0.7cm" fo:margin-top="0.5cm"/>
      </style:footer-style>
    </style:page-layout>
  </office:automatic-styles>
  <office:master-styles>
    <style:master-page style:name="Standard" style:page-layout-name="PL">
      <style:footer>
        <text:p text:style-name="Footer">Figurunica · Pazarlama Kiti · v1.0 · 13 Temmuz 2026 · <text:page-number text:select-page="current">1</text:page-number></text:p>
      </style:footer>
    </style:master-page>
  </office:master-styles>
</office:document-styles>
</file>

<file path=meta.xml><?xml version="1.0" encoding="utf-8"?>
<office:document-meta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svg="urn:oasis:names:tc:opendocument:xmlns:svg-compatible:1.0" xmlns:meta="urn:oasis:names:tc:opendocument:xmlns:meta:1.0" xmlns:dc="http://purl.org/dc/elements/1.1/" office:version="1.3">
  <office:meta>
    <dc:title>Figurunica — Kurumsal &amp; Atölye Kiti</dc:title>
    <dc:subject>Hedef kitle: kafe/restoran/okul/kreş/ofis sahipleri · etkinlik organizatörleri · kurumsal hediye alıcıları · mühendislik ve tasarım ekipleri</dc:subject>
    <dc:language>tr-TR</dc:language>
    <meta:keyword>Figurunica</meta:keyword>
    <meta:keyword>pazarlama</meta:keyword>
  </office:meta>
</office:document-meta>
</file>