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maskot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meta="urn:oasis:names:tc:opendocument:xmlns:meta:1.0" xmlns:dc="http://purl.org/dc/elements/1.1/" office:version="1.3">
  <office:font-face-decls>
    <style:font-face style:name="Liberation Sans" svg:font-family="'Liberation Sans', Arial, sans-serif" style:font-family-generic="swiss" style:font-pitch="variable"/>
  </office:font-face-decls>
  <office:automatic-styles>
    <style:style style:name="a1" style:family="table">
      <style:table-properties style:width="16.8cm" table:align="left" fo:margin-bottom="0.6cm"/>
    </style:style>
    <style:style style:name="a2" style:family="table-column">
      <style:table-column-properties style:column-width="16.8cm"/>
    </style:style>
    <style:style style:name="a3" style:family="table-cell">
      <style:table-cell-properties fo:background-color="#0B0C0F" fo:padding-top="1.1cm" fo:padding-bottom="1.1cm" fo:padding-left="0.9cm" fo:padding-right="0.9cm" fo:border="none"/>
    </style:style>
    <style:style style:name="a4" style:family="table">
      <style:table-properties style:width="16.0cm" table:align="left" fo:margin-top="0.15cm" fo:margin-bottom="0.4cm"/>
    </style:style>
    <style:style style:name="a5" style:family="table-column">
      <style:table-column-properties style:column-width="4.6cm"/>
    </style:style>
    <style:style style:name="a6" style:family="table-column">
      <style:table-column-properties style:column-width="11.4cm"/>
    </style:style>
    <style:style style:name="a7" style:family="table-cell">
      <style:table-cell-properties fo:background-color="#0B3D4C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8" style:family="table-cell">
      <style:table-cell-properties fo:background-color="#FFFFFF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9" style:family="table-cell">
      <style:table-cell-properties fo:background-color="#F5F9FB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10" style:family="table">
      <style:table-properties style:width="16cm" table:align="left" fo:margin-top="0.25cm" fo:margin-bottom="0.4cm"/>
    </style:style>
    <style:style style:name="a11" style:family="table-column">
      <style:table-column-properties style:column-width="16cm"/>
    </style:style>
    <style:style style:name="a12" style:family="table-cell">
      <style:table-cell-properties fo:background-color="#FFFBEB" fo:padding="0.32cm" fo:border="none" fo:border-left="3pt solid #F59E0B"/>
    </style:style>
    <style:style style:name="a13" style:family="paragraph" style:parent-style-name="CoTitle">
      <style:text-properties fo:color="#92400E"/>
    </style:style>
    <style:style style:name="a14" style:family="table">
      <style:table-properties style:width="16.0cm" table:align="left" fo:margin-top="0.15cm" fo:margin-bottom="0.4cm"/>
    </style:style>
    <style:style style:name="a15" style:family="table-column">
      <style:table-column-properties style:column-width="4.6cm"/>
    </style:style>
    <style:style style:name="a16" style:family="table-column">
      <style:table-column-properties style:column-width="11.4cm"/>
    </style:style>
    <style:style style:name="a17" style:family="table-cell">
      <style:table-cell-properties fo:background-color="#0B3D4C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18" style:family="table-cell">
      <style:table-cell-properties fo:background-color="#FFFFFF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19" style:family="table-cell">
      <style:table-cell-properties fo:background-color="#F5F9FB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20" style:family="table">
      <style:table-properties style:width="16.0cm" table:align="left" fo:margin-top="0.15cm" fo:margin-bottom="0.4cm"/>
    </style:style>
    <style:style style:name="a21" style:family="table-column">
      <style:table-column-properties style:column-width="6.4cm"/>
    </style:style>
    <style:style style:name="a22" style:family="table-column">
      <style:table-column-properties style:column-width="3.2cm"/>
    </style:style>
    <style:style style:name="a23" style:family="table-column">
      <style:table-column-properties style:column-width="3.2cm"/>
    </style:style>
    <style:style style:name="a24" style:family="table-column">
      <style:table-column-properties style:column-width="3.2cm"/>
    </style:style>
    <style:style style:name="a25" style:family="table-cell">
      <style:table-cell-properties fo:background-color="#0B3D4C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26" style:family="table-cell">
      <style:table-cell-properties fo:background-color="#FFFFFF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27" style:family="table-cell">
      <style:table-cell-properties fo:background-color="#F5F9FB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28" style:family="table">
      <style:table-properties style:width="16cm" table:align="left" fo:margin-top="0.25cm" fo:margin-bottom="0.4cm"/>
    </style:style>
    <style:style style:name="a29" style:family="table-column">
      <style:table-column-properties style:column-width="16cm"/>
    </style:style>
    <style:style style:name="a30" style:family="table-cell">
      <style:table-cell-properties fo:background-color="#FFFBEB" fo:padding="0.32cm" fo:border="none" fo:border-left="3pt solid #F59E0B"/>
    </style:style>
    <style:style style:name="a31" style:family="paragraph" style:parent-style-name="CoTitle">
      <style:text-properties fo:color="#92400E"/>
    </style:style>
    <style:style style:name="a32" style:family="table">
      <style:table-properties style:width="16.0cm" table:align="left" fo:margin-top="0.15cm" fo:margin-bottom="0.4cm"/>
    </style:style>
    <style:style style:name="a33" style:family="table-column">
      <style:table-column-properties style:column-width="4.6cm"/>
    </style:style>
    <style:style style:name="a34" style:family="table-column">
      <style:table-column-properties style:column-width="5.7cm"/>
    </style:style>
    <style:style style:name="a35" style:family="table-column">
      <style:table-column-properties style:column-width="5.7cm"/>
    </style:style>
    <style:style style:name="a36" style:family="table-cell">
      <style:table-cell-properties fo:background-color="#0B3D4C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37" style:family="table-cell">
      <style:table-cell-properties fo:background-color="#FFFFFF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38" style:family="table-cell">
      <style:table-cell-properties fo:background-color="#F5F9FB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39" style:family="table">
      <style:table-properties style:width="16cm" table:align="left" fo:margin-top="0.25cm" fo:margin-bottom="0.4cm"/>
    </style:style>
    <style:style style:name="a40" style:family="table-column">
      <style:table-column-properties style:column-width="16cm"/>
    </style:style>
    <style:style style:name="a41" style:family="table-cell">
      <style:table-cell-properties fo:background-color="#FEF2F2" fo:padding="0.32cm" fo:border="none" fo:border-left="3pt solid #DC2626"/>
    </style:style>
    <style:style style:name="a42" style:family="paragraph" style:parent-style-name="CoTitle">
      <style:text-properties fo:color="#B91C1C"/>
    </style:style>
    <style:style style:name="a43" style:family="table">
      <style:table-properties style:width="16.0cm" table:align="left" fo:margin-top="0.15cm" fo:margin-bottom="0.4cm"/>
    </style:style>
    <style:style style:name="a44" style:family="table-column">
      <style:table-column-properties style:column-width="4.6cm"/>
    </style:style>
    <style:style style:name="a45" style:family="table-column">
      <style:table-column-properties style:column-width="11.4cm"/>
    </style:style>
    <style:style style:name="a46" style:family="table-cell">
      <style:table-cell-properties fo:background-color="#0B3D4C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47" style:family="table-cell">
      <style:table-cell-properties fo:background-color="#FFFFFF" fo:padding-top="0.14cm" fo:padding-bottom="0.14cm" fo:padding-left="0.2cm" fo:padding-right="0.2cm" fo:border-top="none" fo:border-right="none" fo:border-bottom="0.5pt solid #E3E7EA" fo:border-left="none" style:vertical-align="top"/>
    </style:style>
    <style:style style:name="a48" style:family="table-cell">
      <style:table-cell-properties fo:background-color="#F5F9FB" fo:padding-top="0.14cm" fo:padding-bottom="0.14cm" fo:padding-left="0.2cm" fo:padding-right="0.2cm" fo:border-top="none" fo:border-right="none" fo:border-bottom="0.5pt solid #E3E7EA" fo:border-left="none" style:vertical-align="top"/>
    </style:style>
  </office:automatic-styles>
  <office:body>
    <office:text>
      <table:table table:name="Cover" table:style-name="a1">
        <table:table-column table:style-name="a2"/>
        <table:table-row>
          <table:table-cell table:style-name="a3" office:value-type="string">
            <text:p text:style-name="CvLabel">FIGURUNICA · PAZARLAMA KİTİ</text:p>
            <text:p text:style-name="CvNum">02</text:p>
            <text:p text:style-name="CvTitle">Partner Kazanım Kiti</text:p>
            <text:p text:style-name="CvSub">3D baskı atölyeleri ve el boyama sanatçılarını Figurunica ağına katmak için kazanç modeli, iş akışı, panel ve itiraz karşılama.</text:p>
            <text:p text:style-name="CvImg"><draw:frame draw:name="maskot" text:anchor-type="as-char" svg:width="3.1cm" svg:height="3.1cm" draw:z-index="0"><draw:image xlink:href="Pictures/maskot.png" xlink:type="simple" xlink:show="embed" xlink:actuate="onLoad"/></draw:frame></text:p>
            <text:p text:style-name="CvAud">Hedef kitle: 3D baskı atölyesi (üretici) · el boyama atölyesi / sanatçı (boyacı)</text:p>
          </table:table-cell>
        </table:table-row>
      </table:table>
      <table:table table:name="Ta4" table:style-name="a4">
        <table:table-column table:style-name="a5"/>
        <table:table-column table:style-name="a6"/>
        <table:table-row>
          <table:table-cell table:style-name="a8" office:value-type="string">
            <text:p text:style-name="TdK">Doküman</text:p>
          </table:table-cell>
          <table:table-cell table:style-name="a8" office:value-type="string">
            <text:p text:style-name="Td">02 — Partner Kazanım Kiti</text:p>
          </table:table-cell>
        </table:table-row>
        <table:table-row>
          <table:table-cell table:style-name="a9" office:value-type="string">
            <text:p text:style-name="TdK">Sürüm</text:p>
          </table:table-cell>
          <table:table-cell table:style-name="a9" office:value-type="string">
            <text:p text:style-name="Td">v1.0 · 13 Temmuz 2026</text:p>
          </table:table-cell>
        </table:table-row>
        <table:table-row>
          <table:table-cell table:style-name="a8" office:value-type="string">
            <text:p text:style-name="TdK">Kaynak</text:p>
          </table:table-cell>
          <table:table-cell table:style-name="a8" office:value-type="string">
            <text:p text:style-name="Td">Canlı ürün kodundan doğrulanmış bilgiler (9 alan, 311 bulgu)</text:p>
          </table:table-cell>
        </table:table-row>
        <table:table-row>
          <table:table-cell table:style-name="a9" office:value-type="string">
            <text:p text:style-name="TdK">Kullanım</text:p>
          </table:table-cell>
          <table:table-cell table:style-name="a9" office:value-type="string">
            <text:p text:style-name="Td">İç kullanım — pazarlama ve satış ekibi</text:p>
          </table:table-cell>
        </table:table-row>
      </table:table>
      <table:table table:name="Ca10" table:style-name="a10">
        <table:table-column table:style-name="a11"/>
        <table:table-row>
          <table:table-cell table:style-name="a12" office:value-type="string">
            <text:p text:style-name="a13">Bu doküman müşteriye/partnere olduğu gibi verilmez.</text:p>
            <text:p text:style-name="CoBody">İçinde “asla söylemeyin” bölümü ve netleştirilmemiş operasyonel sorular vardır. Dışarıya çıkacak materyali bu dokümandan <text:span text:style-name="B">üretin</text:span>, dokümanı <text:span text:style-name="B">paylaşmayın</text:span>.</text:p>
          </table:table-cell>
        </table:table-row>
      </table:table>
      <text:p text:style-name="H1PB">İçindekiler</text:p>
      <text:p text:style-name="TocItem">1.  Teklif tek cümlede</text:p>
      <text:p text:style-name="TocItem">2.  30 saniyelik konuşma — üretici</text:p>
      <text:p text:style-name="TocItem">3.  30 saniyelik konuşma — boyacı</text:p>
      <text:p text:style-name="TocItem">4.  Kazanç modeli</text:p>
      <text:p text:style-name="TocItem">5.  Ödeme akışı</text:p>
      <text:p text:style-name="TocItem">6.  Üretici partner — nasıl çalışır</text:p>
      <text:p text:style-name="TocItem">7.  Boyacı partner — nasıl çalışır</text:p>
      <text:p text:style-name="TocItem">8.  Başvuru: ne isteniyor, kaç aşama?</text:p>
      <text:p text:style-name="TocItem">9.  İtiraz karşılama</text:p>
      <text:p text:style-name="TocItem">10.  Asla söylemeyin</text:p>
      <text:p text:style-name="TocItem">11.  Partner görüşmesi öncesi netleştirilecekler</text:p>
      <text:p text:style-name="TocItem">12.  İletişim</text:p>
      <text:h text:style-name="H1" text:outline-level="1">Teklif tek cümlede</text:h>
      <text:p text:style-name="Lead"><text:span text:style-name="B">Üreticiye:</text:span> “Yazıcınız boş durmasın — biz müşteri talebini size getirelim, siz sadece basın, kalite kontrolden geçirin ve kargolayın.” <text:span text:style-name="B">Boyacıya:</text:span> “Baskıyla uğraşmayın, sadece boyayın — üretici size kalite kontrolden geçmiş boyasız figürü devretsin, siz boyayıp doğrudan müşteriye gönderin.”</text:p>
      <table:table table:name="Ta14" table:style-name="a14">
        <table:table-column table:style-name="a15"/>
        <table:table-column table:style-name="a16"/>
        <table:table-row>
          <table:table-cell table:style-name="a18" office:value-type="string">
            <text:p text:style-name="TdK">Komisyon</text:p>
          </table:table-cell>
          <table:table-cell table:style-name="a18" office:value-type="string">
            <text:p text:style-name="Td">Platform %35 · Partnerin net payı %65 — üretici, boyacı ve pazaryeri satışında aynı oran</text:p>
          </table:table-cell>
        </table:table-row>
        <table:table-row>
          <table:table-cell table:style-name="a19" office:value-type="string">
            <text:p text:style-name="TdK">Hak ediş ne zaman</text:p>
          </table:table-cell>
          <table:table-cell table:style-name="a19" office:value-type="string">
            <text:p text:style-name="Td">Üretici: siparişi kargoladığında (boyacıya devrederse devir anında). Boyacı: boyalı ürünü kargoladığında</text:p>
          </table:table-cell>
        </table:table-row>
        <table:table-row>
          <table:table-cell table:style-name="a18" office:value-type="string">
            <text:p text:style-name="TdK">Ödeme</text:p>
          </table:table-cell>
          <table:table-cell table:style-name="a18" office:value-type="string">
            <text:p text:style-name="Td">Panelden “Ödeme Talebi” — bekleyen tüm hak edişler tek pakette admin ödeme kuyruğuna düşer</text:p>
          </table:table-cell>
        </table:table-row>
        <table:table-row>
          <table:table-cell table:style-name="a19" office:value-type="string">
            <text:p text:style-name="TdK">Kapasite kontrolü</text:p>
          </table:table-cell>
          <table:table-cell table:style-name="a19" office:value-type="string">
            <text:p text:style-name="Td">Partnerde: 1–50 arası eş zamanlı iş (varsayılan 5) + “Sipariş Almıyorum” anahtarı</text:p>
          </table:table-cell>
        </table:table-row>
        <table:table-row>
          <table:table-cell table:style-name="a18" office:value-type="string">
            <text:p text:style-name="TdK">Ön ödeme riski</text:p>
          </table:table-cell>
          <table:table-cell table:style-name="a18" office:value-type="string">
            <text:p text:style-name="Td">Yok — üretime yalnızca ödemesi alınmış siparişler düşer</text:p>
          </table:table-cell>
        </table:table-row>
        <table:table-row>
          <table:table-cell table:style-name="a19" office:value-type="string">
            <text:p text:style-name="TdK">Münhasırlık</text:p>
          </table:table-cell>
          <table:table-cell table:style-name="a19" office:value-type="string">
            <text:p text:style-name="Td">Yok. İlişki iş akdi değildir; partner bağımsız hizmet sağlayıcıdır</text:p>
          </table:table-cell>
        </table:table-row>
        <table:table-row>
          <table:table-cell table:style-name="a18" office:value-type="string">
            <text:p text:style-name="TdK">Başvuru</text:p>
          </table:table-cell>
          <table:table-cell table:style-name="a18" office:value-type="string">
            <text:p text:style-name="Td">Beklemede → Koşullu Onaylı → Aktif (3 aşama)</text:p>
          </table:table-cell>
        </table:table-row>
      </table:table>
      <text:h text:style-name="H1" text:outline-level="1">30 saniyelik konuşma — üretici</text:h>
      <text:p text:style-name="Quote">“Siz yazıcınızı kurmuşsunuz ama iş bulmakla uğraşıyorsunuz. Biz müşteriyi, tasarımı ve ödemeyi hallediyoruz — size yalnızca <text:span text:style-name="B">ödemesi alınmış</text:span>, <text:span text:style-name="B">malzemenize uyan</text:span> ve <text:span text:style-name="B">kapasitenize sığan</text:span> işler düşüyor. Platform komisyonu %35, net payınız %65. Kargoladığınız anda hak ediş hesabınıza işlenir, panelden tek tuşla ödeme talep edersiniz. Yoğunsanız “sipariş almıyorum” dersiniz, iş yığılmaz. Münhasırlık yok — kendi işinize devam edersiniz.”</text:p>
      <text:h text:style-name="H1" text:outline-level="1">30 saniyelik konuşma — boyacı</text:h>
      <text:p text:style-name="Quote">“Yazıcıya, reçineye, kargoya yatırım yapmanıza gerek yok. Üretici, kalite kontrolden geçmiş boyasız figürü size devreder; siz boyar, kalite kontrol fotoğrafını yükler ve onaydan sonra doğrudan müşteriye gönderirsiniz. El boyama bedeli ₺1.000 ve komisyon sonrası figür başına net <text:span text:style-name="B">₺650</text:span> kazanırsınız. Aynı anda kaç iş alacağınıza siz karar verirsiniz.”</text:p>
      <text:h text:style-name="H1" text:outline-level="1">Kazanç modeli</text:h>
      <text:p text:style-name="Body">Tek bir oran vardır: <text:span text:style-name="B">platform %35, partner %65.</text:span> Komisyon yuvarlanır, net pay tam kalan olarak verilir — komisyon + net her zaman brüt tutara eşittir, partnerin aleyhine kuruş kaybı olmaz.</text:p>
      <table:table table:name="Ta20" table:style-name="a20">
        <table:table-column table:style-name="a21"/>
        <table:table-column table:style-name="a22"/>
        <table:table-column table:style-name="a23"/>
        <table:table-column table:style-name="a24"/>
        <table:table-header-rows>
          <table:table-row>
            <table:table-cell table:style-name="a25" office:value-type="string">
              <text:p text:style-name="Th">Örnek iş</text:p>
            </table:table-cell>
            <table:table-cell table:style-name="a25" office:value-type="string">
              <text:p text:style-name="Th">Brüt</text:p>
            </table:table-cell>
            <table:table-cell table:style-name="a25" office:value-type="string">
              <text:p text:style-name="Th">Komisyon (%35)</text:p>
            </table:table-cell>
            <table:table-cell table:style-name="a25" office:value-type="string">
              <text:p text:style-name="Th">Partnerin neti (%65)</text:p>
            </table:table-cell>
          </table:table-row>
        </table:table-header-rows>
        <table:table-row>
          <table:table-cell table:style-name="a26" office:value-type="string">
            <text:p text:style-name="TdK">Filament, küçük figür</text:p>
          </table:table-cell>
          <table:table-cell table:style-name="a26" office:value-type="string">
            <text:p text:style-name="Td">₺899</text:p>
          </table:table-cell>
          <table:table-cell table:style-name="a26" office:value-type="string">
            <text:p text:style-name="Td">₺314,65</text:p>
          </table:table-cell>
          <table:table-cell table:style-name="a26" office:value-type="string">
            <text:p text:style-name="Td"><text:span text:style-name="B">₺584,35</text:span></text:p>
          </table:table-cell>
        </table:table-row>
        <table:table-row>
          <table:table-cell table:style-name="a27" office:value-type="string">
            <text:p text:style-name="TdK">Reçine, orta figür (en popüler)</text:p>
          </table:table-cell>
          <table:table-cell table:style-name="a27" office:value-type="string">
            <text:p text:style-name="Td">₺1.399</text:p>
          </table:table-cell>
          <table:table-cell table:style-name="a27" office:value-type="string">
            <text:p text:style-name="Td">₺489,65</text:p>
          </table:table-cell>
          <table:table-cell table:style-name="a27" office:value-type="string">
            <text:p text:style-name="Td"><text:span text:style-name="B">₺909,35</text:span></text:p>
          </table:table-cell>
        </table:table-row>
        <table:table-row>
          <table:table-cell table:style-name="a26" office:value-type="string">
            <text:p text:style-name="TdK">Reçine, büyük figür</text:p>
          </table:table-cell>
          <table:table-cell table:style-name="a26" office:value-type="string">
            <text:p text:style-name="Td">₺1.799</text:p>
          </table:table-cell>
          <table:table-cell table:style-name="a26" office:value-type="string">
            <text:p text:style-name="Td">₺629,65</text:p>
          </table:table-cell>
          <table:table-cell table:style-name="a26" office:value-type="string">
            <text:p text:style-name="Td"><text:span text:style-name="B">₺1.169,35</text:span></text:p>
          </table:table-cell>
        </table:table-row>
        <table:table-row>
          <table:table-cell table:style-name="a27" office:value-type="string">
            <text:p text:style-name="TdK">El boyama bedeli (boyacının tabanı)</text:p>
          </table:table-cell>
          <table:table-cell table:style-name="a27" office:value-type="string">
            <text:p text:style-name="Td">₺1.000</text:p>
          </table:table-cell>
          <table:table-cell table:style-name="a27" office:value-type="string">
            <text:p text:style-name="Td">₺350</text:p>
          </table:table-cell>
          <table:table-cell table:style-name="a27" office:value-type="string">
            <text:p text:style-name="Td"><text:span text:style-name="B">₺650</text:span></text:p>
          </table:table-cell>
        </table:table-row>
      </table:table>
      <text:list text:style-name="UL">
        <text:list-item>
          <text:p text:style-name="ListBody"><text:span text:style-name="B">Normal (boyamasız) sipariş:</text:span> üretici, siparişi kargoladığı anda <text:span text:style-name="B">sipariş tutarının tamamı</text:span> üzerinden hak ediş kazanır.</text:p>
        </text:list-item>
        <text:list-item>
          <text:p text:style-name="ListBody"><text:span text:style-name="B">El boyamalı sipariş, iş boyacıya devredilirse:</text:span> üretici, sipariş tutarından boyama bedeli düşülerek kalan <text:span text:style-name="B">baskı payı</text:span> üzerinden kazanır ve hak edişi <text:span text:style-name="B">devir anında</text:span> tahakkuk eder (kargoyu beklemez). Boyacı ise ₺1.000’lik boyama bedeli üzerinden net ₺650 kazanır.</text:p>
        </text:list-item>
        <text:list-item>
          <text:p text:style-name="ListBody"><text:span text:style-name="B">Kendi atölyesinde boyayan üretici</text:span> (panelden açılan seçenek) boyamalı siparişi hem basar, hem boyar, hem kargolar ve <text:span text:style-name="B">sipariş tutarının tamamı</text:span> üzerinden kazanır — tek işte hem baskı hem boyama payını alır.</text:p>
        </text:list-item>
        <text:list-item>
          <text:p text:style-name="ListBody"><text:span text:style-name="B">Ek gelir:</text:span> aktif üretici, kendi hazır ürünlerini pazaryerine listeleyebilir (admin onayıyla yayına girer, aynı %35 komisyon).</text:p>
        </text:list-item>
        <text:list-item>
          <text:p text:style-name="ListBody"><text:span text:style-name="B">İade/iptal:</text:span> henüz ödenmemiş hak ediş geri alınır ve ödeme paketinden düşülür.</text:p>
        </text:list-item>
      </text:list>
      <text:h text:style-name="H1" text:outline-level="1">Ödeme akışı</text:h>
      <text:list text:style-name="OL">
        <text:list-item>
          <text:p text:style-name="ListBody">Hak edişler sipariş bazında birikir; üretici panelinde <text:span text:style-name="B">Kazançlar</text:span> sayfasında bekleyen tutar, bugüne kadar ödenen toplam ve sipariş sipariş <text:span text:style-name="B">brüt / komisyon / net</text:span> dökümü şeffaf biçimde görünür.</text:p>
        </text:list-item>
        <text:list-item>
          <text:p text:style-name="ListBody">Partner, panelden <text:span text:style-name="B">“Ödeme Talebi”</text:span> düğmesine basar: bekleyen tüm hak edişler tek bir ödeme paketinde toplanıp admin ödeme kuyruğuna düşer.</text:p>
        </text:list-item>
        <text:list-item>
          <text:p text:style-name="ListBody">Admin ödemeyi yaptığında hak edişler “ödendi” durumuna geçer ve geçmiş ödeme listesinde görünür.</text:p>
        </text:list-item>
        <text:list-item>
          <text:p text:style-name="ListBody">Ödemeler yalnızca hesabı <text:span text:style-name="B">aktif</text:span> olan partnerlere yapılır.</text:p>
        </text:list-item>
        <text:list-item>
          <text:p text:style-name="ListBody"><text:span text:style-name="B">IBAN değişikliği admin onayına tabidir</text:span> — güvenlik gereği, onaylanana kadar ödeme eski IBAN’a gider. (Üreticide IBAN değişikliği ayrıca vergi incelemesini yeniden tetikler.)</text:p>
        </text:list-item>
      </text:list>
      <text:h text:style-name="H1PB" text:outline-level="1">Üretici partner — nasıl çalışır</text:h>
      <text:h text:style-name="H2" text:outline-level="2">İş akışı</text:h>
      <text:list text:style-name="OL">
        <text:list-item>
          <text:p text:style-name="ListBody"><text:span text:style-name="B">Sipariş atanır.</text:span> Sadece ödemesi alınmış, malzemenize uyan ve kapasitenize sığan işler gelir. E-posta + panel içi bildirim alırsınız.</text:p>
        </text:list-item>
        <text:list-item>
          <text:p text:style-name="ListBody"><text:span text:style-name="B">Kabul veya reddedersiniz.</text:span> Reddedilen sipariş otomatik olarak sıradaki uygun atölyeye yönlendirilir ve size tekrar teklif edilmez. (Bir sipariş 3 kez reddedilirse yöneticinin manuel atama kuyruğuna düşer.)</text:p>
        </text:list-item>
        <text:list-item>
          <text:p text:style-name="ListBody"><text:span text:style-name="B">Model dosyasını indirirsiniz</text:span> (GLB / STL / OBJ) ve baskıyı başlatıp bitirirsiniz.</text:p>
        </text:list-item>
        <text:list-item>
          <text:p text:style-name="ListBody"><text:span text:style-name="B">Kalite kontrol:</text:span> en az 1 ürün fotoğrafı yükleyip kalite kontrole gönderirsiniz. <text:span text:style-name="B">Zorunludur</text:span> — Figurunica onaylamadan kargolama açılmaz. Reddedilirse düzeltip yeniden gönderirsiniz.</text:p>
        </text:list-item>
        <text:list-item>
          <text:p text:style-name="ListBody"><text:span text:style-name="B">Kargolarsınız</text:span> (veya el boyamalı siparişte boyacıya devredersiniz). Hak ediş bu anda tahakkuk eder.</text:p>
        </text:list-item>
      </text:list>
      <text:h text:style-name="H2" text:outline-level="2">Kontrol sizde</text:h>
      <text:list text:style-name="UL">
        <text:list-item>
          <text:p text:style-name="ListBody"><text:span text:style-name="B">“Sipariş Almıyorum” anahtarı:</text:span> tek tıkla kapatırsınız; kapalıyken hiç yeni sipariş atanmaz, devam eden işler etkilenmez. Tatil ve yoğunluk dönemleri için birebir.</text:p>
        </text:list-item>
        <text:list-item>
          <text:p text:style-name="ListBody"><text:span text:style-name="B">Kapasite:</text:span> 1–50 arası eş zamanlı iş limiti (varsayılan 5). Limite ulaştığınızda yeni iş atanmaz.</text:p>
        </text:list-item>
        <text:list-item>
          <text:p text:style-name="ListBody"><text:span text:style-name="B">Malzeme:</text:span> yalnızca çalıştığınız malzemedeki (reçine ve/veya filament) siparişler yönlendirilir — ekipmanınıza uymayan iş hiç düşmez.</text:p>
        </text:list-item>
        <text:list-item>
          <text:p text:style-name="ListBody"><text:span text:style-name="B">Reddetme hakkı:</text:span> atanan işi reddedebilirsiniz.</text:p>
        </text:list-item>
      </text:list>
      <text:h text:style-name="H2" text:outline-level="2">Sipariş size nasıl geliyor?</text:h>
      <text:p text:style-name="Body">Sistem uygun atölyeleri puanlayıp sıralar: <text:span text:style-name="B">lokasyon</text:span> (aynı şehir/bölge yakınlığı), <text:span text:style-name="B">mevcut iş yükü</text:span>, <text:span text:style-name="B">geçmiş güvenilirlik</text:span> ve <text:span text:style-name="B">uyum puanı</text:span>. Yakındaki ve yükü düşük olan atölyeye öncelik verilir. İlk atamayı yönetici onaylar; bir üretici işi reddettiğinde yeniden yönlendirme otomatik çalışır.</text:p>
      <text:h text:style-name="H2" text:outline-level="2">Panel</text:h>
      <text:p text:style-name="Body">Üretici paneli 5 bölümdür: <text:span text:style-name="B">Siparişler</text:span> (yeni atama rozetiyle), <text:span text:style-name="B">Ürünlerim</text:span> (pazaryeri ürünleri), <text:span text:style-name="B">Kazançlar</text:span>, <text:span text:style-name="B">Bildirimler</text:span> ve <text:span text:style-name="B">Profil</text:span>. Sipariş ekranında model dosyasını indirme, kabul/ret, baskıyı başlat/bitir, kalite kontrol fotoğrafı yükleme, boyacıya gönderme ve kargolama adımları bulunur. Durum değişiklikleri panele canlı düşer.</text:p>
      <text:h text:style-name="H1" text:outline-level="1">Boyacı partner — nasıl çalışır</text:h>
      <text:list text:style-name="OL">
        <text:list-item>
          <text:p text:style-name="ListBody">Üretici, kalite kontrolden geçmiş boyasız baskıyı size <text:span text:style-name="B">devreder</text:span> (boyacıyı üretici seçer).</text:p>
        </text:list-item>
        <text:list-item>
          <text:p text:style-name="ListBody"><text:span text:style-name="B">Kabul veya reddedersiniz.</text:span> Reddederseniz sipariş üreticiye geri döner ve başka bir boyacıya gönderilir.</text:p>
        </text:list-item>
        <text:list-item>
          <text:p text:style-name="ListBody"><text:span text:style-name="B">Boyarsınız.</text:span></text:p>
        </text:list-item>
        <text:list-item>
          <text:p text:style-name="ListBody"><text:span text:style-name="B">Kalite kontrol fotoğrafını</text:span> yükleyip yönetici onayına gönderirsiniz.</text:p>
        </text:list-item>
        <text:list-item>
          <text:p text:style-name="ListBody">Onaydan sonra ürünü <text:span text:style-name="B">doğrudan müşteriye kargolarsınız</text:span> — kargo firmasını ve takip numarasını panele elle girersiniz.</text:p>
        </text:list-item>
      </text:list>
      <text:list text:style-name="UL">
        <text:list-item>
          <text:p text:style-name="ListBody"><text:span text:style-name="B">Kazanç tabanı:</text:span> “El Boyaması” bitişinin kendisi, yani ₺1.000 → net <text:span text:style-name="B">₺650</text:span> (aynı %35 komisyon).</text:p>
        </text:list-item>
        <text:list-item>
          <text:p text:style-name="ListBody"><text:span text:style-name="B">Kapasite:</text:span> profilden 1–50 arası eş zamanlı iş; kapasite üstü iş size devredilemez. “Sipariş almıyorum” anahtarı vardır.</text:p>
        </text:list-item>
        <text:list-item>
          <text:p text:style-name="ListBody"><text:span text:style-name="B">Panel</text:span> 4 bölümdür: Panel, İşler (yeni iş rozeti), Bildirimler, Profil. Ana ekranda atanan / kabul edilen / boyanmakta olan iş sayıları ve <text:span text:style-name="B">bekleyen kazanç tutarı</text:span> görünür.</text:p>
        </text:list-item>
      </text:list>
      <table:table table:name="Ca28" table:style-name="a28">
        <table:table-column table:style-name="a29"/>
        <table:table-row>
          <table:table-cell table:style-name="a30" office:value-type="string">
            <text:p text:style-name="a31">Boyacıya dürüst olun</text:p>
            <text:p text:style-name="CoBody">Boyacı panelinde şu an <text:span text:style-name="B">sipariş bazlı kazanç dökümü, ödeme geçmişi ve “ödeme talep et” düğmesi YOKTUR</text:span> — ödeme süreci ekiple yürütülür. Boyacı adayının soracağı ilk soru budur; “panelden kazancınızı takip edip ödeme talep edersiniz” demeyin, ödemenin nasıl yürüdüğünü operasyondan öğrenip net söyleyin.</text:p>
          </table:table-cell>
        </table:table-row>
      </table:table>
      <text:h text:style-name="H1PB" text:outline-level="1">Başvuru: ne isteniyor, kaç aşama?</text:h>
      <text:p text:style-name="Body">Başvuru <text:span text:style-name="B">3 aşamalıdır:</text:span> Beklemede (admin incelemesi) → Koşullu Onaylı (kanıt yüklenir) → <text:span text:style-name="B">Aktif</text:span> (iş almaya başlar). Hesap aktif olmadan sipariş atanmaz.</text:p>
      <table:table table:name="Ta32" table:style-name="a32">
        <table:table-column table:style-name="a33"/>
        <table:table-column table:style-name="a34"/>
        <table:table-column table:style-name="a35"/>
        <table:table-header-rows>
          <table:table-row>
            <table:table-cell table:style-name="a36" office:value-type="string">
              <text:p text:style-name="Th"/>
            </table:table-cell>
            <table:table-cell table:style-name="a36" office:value-type="string">
              <text:p text:style-name="Th">Üretici</text:p>
            </table:table-cell>
            <table:table-cell table:style-name="a36" office:value-type="string">
              <text:p text:style-name="Th">Boyacı</text:p>
            </table:table-cell>
          </table:table-row>
        </table:table-header-rows>
        <table:table-row>
          <table:table-cell table:style-name="a37" office:value-type="string">
            <text:p text:style-name="TdK">Temel bilgiler</text:p>
          </table:table-cell>
          <table:table-cell table:style-name="a37" office:value-type="string">
            <text:p text:style-name="Td">Firma adı, yetkili kişi, e-posta, telefon (WhatsApp opsiyonel), şifre</text:p>
          </table:table-cell>
          <table:table-cell table:style-name="a37" office:value-type="string">
            <text:p text:style-name="Td">Firma adı, yetkili kişi, e-posta, telefon (WhatsApp opsiyonel), şifre</text:p>
          </table:table-cell>
        </table:table-row>
        <table:table-row>
          <table:table-cell table:style-name="a38" office:value-type="string">
            <text:p text:style-name="TdK">Adres</text:p>
          </table:table-cell>
          <table:table-cell table:style-name="a38" office:value-type="string">
            <text:p text:style-name="Td">Tam adres (il / ilçe / mahalle / posta kodu / açık adres)</text:p>
          </table:table-cell>
          <table:table-cell table:style-name="a38" office:value-type="string">
            <text:p text:style-name="Td">Tam adres</text:p>
          </table:table-cell>
        </table:table-row>
        <table:table-row>
          <table:table-cell table:style-name="a37" office:value-type="string">
            <text:p text:style-name="TdK">Mesleki bilgi</text:p>
          </table:table-cell>
          <table:table-cell table:style-name="a37" office:value-type="string">
            <text:p text:style-name="Td">Üretim malzemesi (reçine ve/veya filament) + kapasite</text:p>
          </table:table-cell>
          <table:table-cell table:style-name="a37" office:value-type="string">
            <text:p text:style-name="Td">En az bir boyama tekniği + kapasite</text:p>
          </table:table-cell>
        </table:table-row>
        <table:table-row>
          <table:table-cell table:style-name="a38" office:value-type="string">
            <text:p text:style-name="TdK">IBAN</text:p>
          </table:table-cell>
          <table:table-cell table:style-name="a38" office:value-type="string">
            <text:p text:style-name="Td">Başvuruda: IBAN + hesap sahibi + banka adı</text:p>
          </table:table-cell>
          <table:table-cell table:style-name="a38" office:value-type="string">
            <text:p text:style-name="Td">Hesap aktifleştikten SONRA panelden girilir</text:p>
          </table:table-cell>
        </table:table-row>
        <table:table-row>
          <table:table-cell table:style-name="a37" office:value-type="string">
            <text:p text:style-name="TdK">Vergi no</text:p>
          </table:table-cell>
          <table:table-cell table:style-name="a37" office:value-type="string">
            <text:p text:style-name="Td">VKN/TCKN alanı var ancak zorunlu değil (boş bırakılırsa admin manuel inceler)</text:p>
          </table:table-cell>
          <table:table-cell table:style-name="a37" office:value-type="string">
            <text:p text:style-name="Td">—</text:p>
          </table:table-cell>
        </table:table-row>
        <table:table-row>
          <table:table-cell table:style-name="a38" office:value-type="string">
            <text:p text:style-name="TdK">Koşullu onay kanıtı</text:p>
          </table:table-cell>
          <table:table-cell table:style-name="a38" office:value-type="string">
            <text:p text:style-name="Td">Kullanılan 3D yazıcıların net fotoğrafları (birden çok yazıcı için ayrı fotoğraf; JPEG/PNG, dosya başına en fazla 10 MB)</text:p>
          </table:table-cell>
          <table:table-cell table:style-name="a38" office:value-type="string">
            <text:p text:style-name="Td">Örnek çalışma</text:p>
          </table:table-cell>
        </table:table-row>
        <table:table-row>
          <table:table-cell table:style-name="a37" office:value-type="string">
            <text:p text:style-name="TdK">Sözleşme</text:p>
          </table:table-cell>
          <table:table-cell table:style-name="a37" office:value-type="string">
            <text:p text:style-name="Td">Onay zorunlu — kutu işaretlenmeden kayıt açılmaz; komisyon oranı sözleşmede yazılı</text:p>
          </table:table-cell>
          <table:table-cell table:style-name="a37" office:value-type="string">
            <text:p text:style-name="Td">Onay zorunlu</text:p>
          </table:table-cell>
        </table:table-row>
        <table:table-row>
          <table:table-cell table:style-name="a38" office:value-type="string">
            <text:p text:style-name="TdK">Panele giriş</text:p>
          </table:table-cell>
          <table:table-cell table:style-name="a38" office:value-type="string">
            <text:p text:style-name="Td">Hesap onaylanana kadar giriş yapılamaz</text:p>
          </table:table-cell>
          <table:table-cell table:style-name="a38" office:value-type="string">
            <text:p text:style-name="Td">Giriş yapıp durum ekranını görebilir, ancak aktif olmadan iş almaz</text:p>
          </table:table-cell>
        </table:table-row>
      </table:table>
      <text:p text:style-name="Body">Üretici ayrıca panelden <text:span text:style-name="B">KYC belgesi</text:span> yükleyebilir: vergi levhası, ticaret sicil, imza sirküleri, kimlik ve diğer (JPEG/PNG/PDF, dosya başına en fazla 10 MB). Belgeler hesap onay beklerken de yüklenebilir. Yazıcı fotoğrafı yüklendikten sonra panelde “hesabınız 24 saat içinde incelenip onaylanacaktır” bilgisi gösterilir.</text:p>
      <text:h text:style-name="H1" text:outline-level="1">İtiraz karşılama</text:h>
      <text:p text:style-name="QaQ">Parasını almadığım iş için üretim yapar mıyım?</text:p>
      <text:p text:style-name="QaA">Hayır. Üretime yalnızca <text:span text:style-name="B">ödemesi alınmış</text:span> siparişler düşer. Ön ödeme riski yoktur.</text:p>
      <text:p text:style-name="QaQ">Ödemem ne zaman yapılıyor?</text:p>
      <text:p text:style-name="QaA">Panelden ödeme talebi oluşturduğunuzda bekleyen tüm hak edişleriniz tek pakette admin ödeme kuyruğuna düşer ve ödendiğinde kapanır. <text:span text:style-name="B">Sabit bir haftalık otomatik ödeme günü vaat etmiyoruz.</text:span></text:p>
      <text:p text:style-name="QaQ">Tatildeyim / yoğunum, iş yığılır mı?</text:p>
      <text:p text:style-name="QaA">“Sipariş Almıyorum” anahtarını kapatır veya kapasitenizi düşürürsünüz — yeni iş atanmaz, devam eden işler etkilenmez.</text:p>
      <text:p text:style-name="QaQ">Ekipmanıma uymayan iş gelir mi?</text:p>
      <text:p text:style-name="QaA">Hayır. Yalnızca seçtiğiniz malzemedeki (reçine ve/veya filament) siparişler yönlendirilir.</text:p>
      <text:p text:style-name="QaQ">Kalite tartışması çıkarsa ne olur?</text:p>
      <text:p text:style-name="QaA">Her siparişte fotoğraflı kalite kontrol turu vardır; Figurunica onaylamadan kargolama açılmaz ve kaç turda geçildiği kayıt altındadır. İade/uyuşmazlıkta henüz ödenmemiş hak ediş geri alınır. Kabul edilen siparişi iptal etmeniz veya müşteri şikâyetinin aleyhinize sonuçlanması “strike” doğurur; <text:span text:style-name="B">3 strike’ta hesap otomatik askıya alınır.</text:span> (Boyacılarda strike mekanizması yoktur.)</text:p>
      <text:p text:style-name="QaQ">Başka işlerime devam edebilir miyim?</text:p>
      <text:p text:style-name="QaA">Evet. Münhasırlık yoktur ve ilişki bir iş akdi (işçi–işveren) doğurmaz; bağımsız hizmet sağlayıcı olarak kendi ekipmanınız ve malzemenizle çalışırsınız. Vergi/fatura yükümlülüğü size aittir.</text:p>
      <text:p text:style-name="QaQ">İşi nasıl alıyorum? (boyacı)</text:p>
      <text:p text:style-name="QaA">Boyacıya iş ataması algoritmik değildir: üretici, panelinden boyacı seçip işi devreder. Otomatik sıraya girme veya yeniden yönlendirme boyacı tarafında yoktur.</text:p>
      <text:p text:style-name="QaQ">Kargoyu ben mi yapıyorum? (boyacı)</text:p>
      <text:p text:style-name="QaA">Evet. Boyalı ürünü kalite kontrol onayından sonra doğrudan müşteriye siz kargolarsınız; kargo firmasını ve takip numarasını panele elle girersiniz.</text:p>
      <text:h text:style-name="H1PB" text:outline-level="1">Asla söylemeyin</text:h>
      <table:table table:name="Ca39" table:style-name="a39">
        <table:table-column table:style-name="a40"/>
        <table:table-row>
          <table:table-cell table:style-name="a41" office:value-type="string">
            <text:p text:style-name="a42">Partner adayına verilmiş yanlış söz, ilk ayda kaybedilen partnerdir</text:p>
            <text:p text:style-name="CoBody">Aşağıdakiler sistemde YOKTUR. Söylenirse partner ilk hafta fark eder ve güven biter.</text:p>
          </table:table-cell>
        </table:table-row>
      </table:table>
      <text:list text:style-name="UL">
        <text:list-item>
          <text:p text:style-name="ListBody"><text:span text:style-name="B">ASLA %70/%30 demeyin.</text:span> Tek geçerli oran: <text:span text:style-name="B">%35 platform / %65 partner.</text:span> (Koddaki bazı eski yorumlar yanıltıcıdır.)</text:p>
        </text:list-item>
        <text:list-item>
          <text:p text:style-name="ListBody"><text:span text:style-name="B">“%65 cebinize kalan kârdır” demeyin</text:span> — kargo/paketleme maliyetleri ayrı bir kesinti mekanizmasıyla modellenmiyor; %65 brüt hak ediştir.</text:p>
        </text:list-item>
        <text:list-item>
          <text:p text:style-name="ListBody"><text:span text:style-name="B">“Her Cuma otomatik ödeme.”</text:span> — Zamanlanmış toplu ödeme yoktur. *Doğru mesaj:* “panelden talep ettiğinizde toplu ödeme”.</text:p>
        </text:list-item>
        <text:list-item>
          <text:p text:style-name="ListBody"><text:span text:style-name="B">“Ödeme raporunuzu panelden indirin.”</text:span> — CSV/PDF rapor dışa aktarma yoktur.</text:p>
        </text:list-item>
        <text:list-item>
          <text:p text:style-name="ListBody"><text:span text:style-name="B">“Kargo etiketi panelinize düşer.”</text:span> — Üretici paneli etiket üretmez; takip numarası elle girilir.</text:p>
        </text:list-item>
        <text:list-item>
          <text:p text:style-name="ListBody"><text:span text:style-name="B">“Yanıt vermezseniz sipariş 24 saat içinde otomatik başka atölyeye gider.”</text:span> — Böyle bir zaman aşımı yoktur; yeniden yönlendirme yalnızca açıkça “Reddet” denince çalışır.</text:p>
        </text:list-item>
        <text:list-item>
          <text:p text:style-name="ListBody"><text:span text:style-name="B">“Sipariş otomatik olarak üreticiye düşer.”</text:span> — Sistem adayları puanlayıp sıralar, <text:span text:style-name="B">ilk atamayı yönetici onaylar.</text:span></text:p>
        </text:list-item>
        <text:list-item>
          <text:p text:style-name="ListBody"><text:span text:style-name="B">“Atölyeleri zamanında teslim performansına göre seçiyoruz.”</text:span> — Zamanında teslim şu an atama önceliğini etkilemiyor.</text:p>
        </text:list-item>
        <text:list-item>
          <text:p text:style-name="ListBody"><text:span text:style-name="B">Boyacıya “kazançlarınızı panelden takip edip ödeme talep edin” demeyin</text:span> — boyacı panelinde Kazançlar sayfası, sipariş bazlı döküm ve ödeme talep düğmesi yoktur.</text:p>
        </text:list-item>
        <text:list-item>
          <text:p text:style-name="ListBody"><text:span text:style-name="B">“Reddedilen boyama işi otomatik sıradaki boyacıya gider” demeyin</text:span> — boyacı ataması algoritmik değildir.</text:p>
        </text:list-item>
        <text:list-item>
          <text:p text:style-name="ListBody"><text:span text:style-name="B">“Onaylanmadan panele giriş yok” iddiasını genellemeyin</text:span> — bu üretici için doğrudur; boyacı giriş yapıp durum ekranını görebilir.</text:p>
        </text:list-item>
        <text:list-item>
          <text:p text:style-name="ListBody"><text:span text:style-name="B">Pazaryerinde “satıcı vitrini / tüm ürünlerimi gör” sayfası vaat etmeyin</text:span> — satıcı profil sayfası yoktur.</text:p>
        </text:list-item>
      </text:list>
      <text:h text:style-name="H1" text:outline-level="1">Partner görüşmesi öncesi netleştirilecekler</text:h>
      <text:list text:style-name="OL">
        <text:list-item>
          <text:p text:style-name="ListBody">Partner ödemeleri hangi ritimde yapılıyor — talepten sonra kaç iş günü? (Sözleşmedeki “her Cuma” ifadesinin kodda karşılığı yok; net bir taahhüt lazım.)</text:p>
        </text:list-item>
        <text:list-item>
          <text:p text:style-name="ListBody">Boyacı partnerlere kazanç dökümü ve ödeme talebi paneli ne zaman gelecek? Kazanım görüşmesinde sorulacak ilk soru budur.</text:p>
        </text:list-item>
        <text:list-item>
          <text:p text:style-name="ListBody">Boyacı ödemeleri şu an fiilen nasıl yapılıyor? (Panelde düğme olmadığına göre operasyonel akış nedir?)</text:p>
        </text:list-item>
        <text:list-item>
          <text:p text:style-name="ListBody">“Lüks Vitrin” paketi tam el boyaması vaat ediyor ama sipariş otomatik olarak boyacıya yönlenmiyor — operasyon bunu nasıl karşılıyor?</text:p>
        </text:list-item>
        <text:list-item>
          <text:p text:style-name="ListBody">Boyacı rolü ve atölye talepleri canlı veritabanında aktif mi? “Canlıda” demeden önce teyit gerekir.</text:p>
        </text:list-item>
      </text:list>
      <text:h text:style-name="H1" text:outline-level="1">İletişim</text:h>
      <table:table table:name="Ta43" table:style-name="a43">
        <table:table-column table:style-name="a44"/>
        <table:table-column table:style-name="a45"/>
        <table:table-row>
          <table:table-cell table:style-name="a47" office:value-type="string">
            <text:p text:style-name="TdK">Web</text:p>
          </table:table-cell>
          <table:table-cell table:style-name="a47" office:value-type="string">
            <text:p text:style-name="Td">figurunica.com</text:p>
          </table:table-cell>
        </table:table-row>
        <table:table-row>
          <table:table-cell table:style-name="a48" office:value-type="string">
            <text:p text:style-name="TdK">E-posta</text:p>
          </table:table-cell>
          <table:table-cell table:style-name="a48" office:value-type="string">
            <text:p text:style-name="Td">info@figurunica.com</text:p>
          </table:table-cell>
        </table:table-row>
        <table:table-row>
          <table:table-cell table:style-name="a47" office:value-type="string">
            <text:p text:style-name="TdK">Telefon / WhatsApp</text:p>
          </table:table-cell>
          <table:table-cell table:style-name="a47" office:value-type="string">
            <text:p text:style-name="Td">+90 850 840 73 03</text:p>
          </table:table-cell>
        </table:table-row>
        <table:table-row>
          <table:table-cell table:style-name="a48" office:value-type="string">
            <text:p text:style-name="TdK">Stüdyo</text:p>
          </table:table-cell>
          <table:table-cell table:style-name="a48" office:value-type="string">
            <text:p text:style-name="Td">Şehit Osman Avcı Mah., Akın 688 Sitesi B32, Etimesgut / Ankara</text:p>
          </table:table-cell>
        </table:table-row>
        <table:table-row>
          <table:table-cell table:style-name="a47" office:value-type="string">
            <text:p text:style-name="TdK">Sipariş takibi</text:p>
          </table:table-cell>
          <table:table-cell table:style-name="a47" office:value-type="string">
            <text:p text:style-name="Td">figurunica.com/track/&lt;sipariş-numarası&gt; — üyelik gerekmez</text:p>
          </table:table-cell>
        </table:table-row>
      </table:table>
      <text:p text:style-name="Note">Bu doküman canlı koddan doğrulanmış bilgilerle üretilmiştir (sürüm v1.0 · 13 Temmuz 2026). Fiyat veya politika değiştiğinde pazarlama ekibi güncel sürümü talep etmelid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meta="urn:oasis:names:tc:opendocument:xmlns:meta:1.0" xmlns:dc="http://purl.org/dc/elements/1.1/" office:version="1.3">
  <office:font-face-decls>
    <style:font-face style:name="Liberation Sans" svg:font-family="'Liberation Sans', Arial, sans-serif" style:font-family-generic="swiss" style:font-pitch="variable"/>
  </office:font-face-decls>
  <office:styles>
    <style:default-style style:family="paragraph">
      <style:paragraph-properties fo:hyphenate="false" style:line-height-at-least="0.42cm"/>
      <style:text-properties style:font-name="Liberation Sans" fo:font-size="10.5pt" fo:color="#0B0C0F" fo:language="tr" fo:country="TR"/>
    </style:default-style>
    <style:style style:name="Standard" style:family="paragraph">
      <style:paragraph-properties fo:margin-bottom="0.26cm" fo:line-height="138%"/>
      <style:text-properties style:font-name="Liberation Sans" fo:font-size="10.5pt" fo:color="#0B0C0F"/>
    </style:style>
    <style:style style:name="Body" style:family="paragraph" style:parent-style-name="Standard">
      <style:paragraph-properties fo:margin-bottom="0.26cm" fo:line-height="138%" fo:text-align="justify"/>
    </style:style>
    <style:style style:name="Lead" style:family="paragraph" style:parent-style-name="Standard">
      <style:paragraph-properties fo:margin-bottom="0.36cm" fo:line-height="146%"/>
      <style:text-properties fo:font-size="11.5pt" fo:color="#44464E"/>
    </style:style>
    <style:style style:name="Note" style:family="paragraph" style:parent-style-name="Standard">
      <style:paragraph-properties fo:margin-top="0.1cm" fo:margin-bottom="0.3cm"/>
      <style:text-properties fo:font-size="9.5pt" fo:font-style="italic" fo:color="#8A8C93"/>
    </style:style>
    <style:style style:name="H1" style:family="paragraph" style:parent-style-name="Standard">
      <style:paragraph-properties fo:margin-top="0.75cm" fo:margin-bottom="0.3cm" fo:keep-with-next="always" fo:padding-bottom="0.12cm" fo:border-bottom="1.5pt solid #00D4FF" fo:border-top="none" fo:border-left="none" fo:border-right="none"/>
      <style:text-properties fo:font-size="16.5pt" fo:font-weight="bold" fo:color="#0B3D4C"/>
    </style:style>
    <style:style style:name="H1PB" style:family="paragraph" style:parent-style-name="H1">
      <style:paragraph-properties fo:margin-top="0.75cm" fo:margin-bottom="0.3cm" fo:keep-with-next="always" fo:padding-bottom="0.12cm" fo:border-bottom="1.5pt solid #00D4FF" fo:border-top="none" fo:border-left="none" fo:border-right="none" fo:break-before="page"/>
    </style:style>
    <style:style style:name="H2" style:family="paragraph" style:parent-style-name="Standard">
      <style:paragraph-properties fo:margin-top="0.5cm" fo:margin-bottom="0.18cm" fo:keep-with-next="always"/>
      <style:text-properties fo:font-size="12pt" fo:font-weight="bold" fo:color="#0E7490"/>
    </style:style>
    <style:style style:name="ListBody" style:family="paragraph" style:parent-style-name="Standard">
      <style:paragraph-properties fo:margin-bottom="0.16cm" fo:line-height="136%"/>
    </style:style>
    <style:style style:name="Quote" style:family="paragraph" style:parent-style-name="Standard">
      <style:paragraph-properties fo:margin-left="0.5cm" fo:margin-right="0.3cm" fo:margin-top="0.25cm" fo:margin-bottom="0.35cm" fo:padding="0.32cm" fo:background-color="#F5F9FB" fo:border-left="3pt solid #0891B2" fo:border-top="none" fo:border-bottom="none" fo:border-right="none" fo:line-height="150%"/>
      <style:text-properties fo:font-size="11.5pt" fo:font-style="italic" fo:color="#0B3D4C"/>
    </style:style>
    <style:style style:name="QaQ" style:family="paragraph" style:parent-style-name="Standard">
      <style:paragraph-properties fo:margin-top="0.28cm" fo:margin-bottom="0.08cm" fo:keep-with-next="always"/>
      <style:text-properties fo:font-size="10.5pt" fo:font-weight="bold" fo:color="#0B3D4C"/>
    </style:style>
    <style:style style:name="QaA" style:family="paragraph" style:parent-style-name="Standard">
      <style:paragraph-properties fo:margin-left="0.35cm" fo:margin-bottom="0.1cm" fo:line-height="138%"/>
    </style:style>
    <style:style style:name="Th" style:family="paragraph" style:parent-style-name="Standard">
      <style:paragraph-properties fo:margin-bottom="0cm"/>
      <style:text-properties fo:font-size="9.5pt" fo:font-weight="bold" fo:color="#FFFFFF"/>
    </style:style>
    <style:style style:name="Td" style:family="paragraph" style:parent-style-name="Standard">
      <style:paragraph-properties fo:margin-bottom="0cm" fo:line-height="130%"/>
      <style:text-properties fo:font-size="9.5pt"/>
    </style:style>
    <style:style style:name="TdK" style:family="paragraph" style:parent-style-name="Standard">
      <style:paragraph-properties fo:margin-bottom="0cm" fo:line-height="130%"/>
      <style:text-properties fo:font-size="9.5pt" fo:font-weight="bold" fo:color="#0B3D4C"/>
    </style:style>
    <style:style style:name="CoTitle" style:family="paragraph" style:parent-style-name="Standard">
      <style:paragraph-properties fo:margin-bottom="0.12cm"/>
      <style:text-properties fo:font-size="10.5pt" fo:font-weight="bold"/>
    </style:style>
    <style:style style:name="CoBody" style:family="paragraph" style:parent-style-name="Standard">
      <style:paragraph-properties fo:margin-bottom="0.1cm" fo:line-height="136%"/>
      <style:text-properties fo:font-size="10pt"/>
    </style:style>
    <style:style style:name="CvLabel" style:family="paragraph" style:parent-style-name="Standard">
      <style:paragraph-properties fo:margin-bottom="0.15cm"/>
      <style:text-properties fo:font-size="9pt" fo:font-weight="bold" fo:color="#00D4FF" fo:letter-spacing="0.06cm"/>
    </style:style>
    <style:style style:name="CvNum" style:family="paragraph" style:parent-style-name="Standard">
      <style:paragraph-properties fo:margin-bottom="0.1cm"/>
      <style:text-properties fo:font-size="40pt" fo:font-weight="bold" fo:color="#00D4FF"/>
    </style:style>
    <style:style style:name="CvTitle" style:family="paragraph" style:parent-style-name="Standard">
      <style:paragraph-properties fo:margin-bottom="0.25cm"/>
      <style:text-properties fo:font-size="30pt" fo:font-weight="bold" fo:color="#FFFFFF"/>
    </style:style>
    <style:style style:name="CvSub" style:family="paragraph" style:parent-style-name="Standard">
      <style:paragraph-properties fo:margin-bottom="0.3cm" fo:line-height="140%"/>
      <style:text-properties fo:font-size="11.5pt" fo:color="#CDF6FD"/>
    </style:style>
    <style:style style:name="CvAud" style:family="paragraph" style:parent-style-name="Standard">
      <style:paragraph-properties fo:margin-bottom="0cm"/>
      <style:text-properties fo:font-size="10pt" fo:font-weight="bold" fo:color="#00D4FF"/>
    </style:style>
    <style:style style:name="CvImg" style:family="paragraph" style:parent-style-name="Standard">
      <style:paragraph-properties fo:text-align="center" fo:margin-top="0.6cm" fo:margin-bottom="0.4cm"/>
    </style:style>
    <style:style style:name="TocItem" style:family="paragraph" style:parent-style-name="Standard">
      <style:paragraph-properties fo:margin-bottom="0.12cm" fo:margin-left="0.3cm"/>
      <style:text-properties fo:font-size="10.5pt"/>
    </style:style>
    <style:style style:name="Footer" style:family="paragraph" style:parent-style-name="Standard">
      <style:paragraph-properties fo:margin-bottom="0cm" fo:text-align="center"/>
      <style:text-properties fo:font-size="8.5pt" fo:color="#8A8C93"/>
    </style:style>
    <style:style style:name="B" style:family="text">
      <style:text-properties fo:font-weight="bold" fo:color="#0B3D4C"/>
    </style:style>
    <style:style style:name="BW" style:family="text">
      <style:text-properties fo:font-weight="bold" fo:color="#FFFFFF"/>
    </style:style>
    <text:list-style style:name="UL">
      <text:list-level-style-bullet text:level="1" text:bullet-char="•">
        <style:list-level-properties text:space-before="0.35cm" text:min-label-width="0.42cm"/>
        <style:text-properties style:font-name="Liberation Sans" fo:color="#0891B2"/>
      </text:list-level-style-bullet>
      <text:list-level-style-bullet text:level="2" text:bullet-char="–">
        <style:list-level-properties text:space-before="0.85cm" text:min-label-width="0.42cm"/>
        <style:text-properties style:font-name="Liberation Sans" fo:color="#0891B2"/>
      </text:list-level-style-bullet>
    </text:list-style>
    <text:list-style style:name="OL">
      <text:list-level-style-number text:level="1" style:num-suffix="." style:num-format="1">
        <style:list-level-properties text:space-before="0.35cm" text:min-label-width="0.55cm"/>
        <style:text-properties style:font-name="Liberation Sans" fo:font-weight="bold" fo:color="#0891B2"/>
      </text:list-level-style-number>
    </text:list-style>
  </office:styles>
  <office:automatic-styles>
    <style:page-layout style:name="PL">
      <style:page-layout-properties fo:page-width="21cm" fo:page-height="29.7cm" style:print-orientation="portrait" fo:margin-top="1.9cm" fo:margin-bottom="1.7cm" fo:margin-left="2.1cm" fo:margin-right="2.1cm"/>
      <style:footer-style>
        <style:header-footer-properties fo:min-height="0.7cm" fo:margin-top="0.5cm"/>
      </style:footer-style>
    </style:page-layout>
  </office:automatic-styles>
  <office:master-styles>
    <style:master-page style:name="Standard" style:page-layout-name="PL">
      <style:footer>
        <text:p text:style-name="Footer">Figurunica · Pazarlama Kiti · v1.0 · 13 Temmuz 2026 ·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meta="urn:oasis:names:tc:opendocument:xmlns:meta:1.0" xmlns:dc="http://purl.org/dc/elements/1.1/" office:version="1.3">
  <office:meta>
    <dc:title>Figurunica — Partner Kazanım Kiti</dc:title>
    <dc:subject>Hedef kitle: 3D baskı atölyesi (üretici) · el boyama atölyesi / sanatçı (boyacı)</dc:subject>
    <dc:language>tr-TR</dc:language>
    <meta:keyword>Figurunica</meta:keyword>
    <meta:keyword>pazarlama</meta:keyword>
  </office:meta>
</office:document-meta>
</file>